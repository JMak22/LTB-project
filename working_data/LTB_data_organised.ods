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4.426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4.747cm"/>
    </style:style>
    <style:style style:name="co11" style:family="table-column">
      <style:table-column-properties fo:break-before="auto" style:column-width="3.745cm"/>
    </style:style>
    <style:style style:name="co12" style:family="table-column">
      <style:table-column-properties fo:break-before="auto" style:column-width="4.108cm"/>
    </style:style>
    <style:style style:name="co13" style:family="table-column">
      <style:table-column-properties fo:break-before="auto" style:column-width="3.971cm"/>
    </style:style>
    <style:style style:name="co14" style:family="table-column">
      <style:table-column-properties fo:break-before="auto" style:column-width="2.155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1.152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1.746cm"/>
    </style:style>
    <style:style style:name="co19" style:family="table-column">
      <style:table-column-properties fo:break-before="auto" style:column-width="2.519cm"/>
    </style:style>
    <style:style style:name="co20" style:family="table-column">
      <style:table-column-properties fo:break-before="auto" style:column-width="6.491cm"/>
    </style:style>
    <style:style style:name="co21" style:family="table-column">
      <style:table-column-properties fo:break-before="auto" style:column-width="2.337cm"/>
    </style:style>
    <style:style style:name="co22" style:family="table-column">
      <style:table-column-properties fo:break-before="auto" style:column-width="2.868cm"/>
    </style:style>
    <style:style style:name="co23" style:family="table-column">
      <style:table-column-properties fo:break-before="auto" style:column-width="7.553cm"/>
    </style:style>
    <style:style style:name="co24" style:family="table-column">
      <style:table-column-properties fo:break-before="auto" style:column-width="3.004cm"/>
    </style:style>
    <style:style style:name="co25" style:family="table-column">
      <style:table-column-properties fo:break-before="auto" style:column-width="2.268cm"/>
    </style:style>
    <style:style style:name="co26" style:family="table-column">
      <style:table-column-properties fo:break-before="auto" style:column-width="2.704cm"/>
    </style:style>
    <style:style style:name="co27" style:family="table-column">
      <style:table-column-properties fo:break-before="auto" style:column-width="3.29cm"/>
    </style:style>
    <style:style style:name="co28" style:family="table-column">
      <style:table-column-properties fo:break-before="auto" style:column-width="9.01cm"/>
    </style:style>
    <style:style style:name="co29" style:family="table-column">
      <style:table-column-properties fo:break-before="auto" style:column-width="3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c9211e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>
      <style:table-cell-properties fo:border-bottom="none" fo:border-left="0.99pt solid #000000" fo:border-right="none" fo:border-top="none"/>
    </style:style>
    <style:style style:name="ce1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Value">
      <style:table-cell-properties fo:border-bottom="none" fo:border-left="none" fo:border-right="none" fo:border-top="0.99pt solid #000000"/>
    </style:style>
    <style:style style:name="ce23" style:family="table-cell" style:parent-style-name="Pivot_20_Table_20_Value">
      <style:table-cell-properties fo:border-bottom="0.99pt solid #000000" fo:border-left="none" fo:border-right="none" fo:border-top="none"/>
    </style:style>
    <style:style style:name="ce24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Value">
      <style:table-cell-properties fo:border-bottom="none" fo:border-left="none" fo:border-right="0.99pt solid #000000" fo:border-top="none"/>
    </style:style>
    <style:style style:name="ce2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8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1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33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4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4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Default">
      <style:table-cell-properties fo:border="none"/>
    </style:style>
    <style:style style:name="ce88" style:family="table-cell" style:parent-style-name="Default">
      <style:text-properties fo:color="#f44336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eport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Uploaded to GH May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ort_id</text:p>
          </table:table-cell>
          <table:table-cell office:value-type="string" calcext:value-type="string">
            <text:p>report_label</text:p>
          </table:table-cell>
          <table:table-cell office:value-type="string" calcext:value-type="string">
            <text:p>start_period</text:p>
          </table:table-cell>
          <table:table-cell office:value-type="string" calcext:value-type="string">
            <text:p>end_period</text:p>
          </table:table-cell>
          <table:table-cell office:value-type="string" calcext:value-type="string">
            <text:p>report_period_notes</text:p>
          </table:table-cell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1998-1999</text:p>
          </table:table-cell>
          <table:table-cell office:value-type="string" calcext:value-type="string">
            <text:p>06-1998</text:p>
          </table:table-cell>
          <table:table-cell office:value-type="string" calcext:value-type="string">
            <text:p>03-1999</text:p>
          </table:table-cell>
          <table:table-cell office:value-type="string" calcext:value-type="string">
            <text:p>Tenant Protection Act proclaimed June 17, 1998</text:p>
          </table:table-cell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1999-2000</text:p>
          </table:table-cell>
          <table:table-cell office:value-type="string" calcext:value-type="string">
            <text:p>04-1999</text:p>
          </table:table-cell>
          <table:table-cell office:value-type="string" calcext:value-type="string">
            <text:p>03-2000</text:p>
          </table:table-cell>
          <table:table-cell office:value-type="string" calcext:value-type="string">
            <text:p>Fiscal year reporting starts</text:p>
          </table:table-cell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2000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2001-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2002-2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2003-2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2004-2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2005-2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2006-2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2007-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2008-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2009-2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2010-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2011-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2012-2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2013-2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2014-2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2015-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2016-2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2017-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2018-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2019-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2020-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2021-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2022-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2023-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2024-2025</text:p>
          </table:table-cell>
          <table:table-cell table:number-columns-repeated="3"/>
        </table:table-row>
      </table:table>
      <table:table table:name="data_dict" table:style-name="ta1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report_id</text:p>
          </table:table-cell>
          <table:table-cell office:value-type="string" calcext:value-type="string">
            <text:p>Report years, sausage form</text:p>
          </table:table-cell>
        </table:table-row>
        <table:table-row table:style-name="ro1">
          <table:table-cell office:value-type="string" calcext:value-type="string">
            <text:p>report_label</text:p>
          </table:table-cell>
          <table:table-cell office:value-type="string" calcext:value-type="string">
            <text:p>Report years, kebab form</text:p>
          </table:table-cell>
        </table:table-row>
        <table:table-row table:style-name="ro1">
          <table:table-cell office:value-type="string" calcext:value-type="string">
            <text:p>start_period</text:p>
          </table:table-cell>
          <table:table-cell office:value-type="string" calcext:value-type="string">
            <text:p>Report start period</text:p>
          </table:table-cell>
        </table:table-row>
        <table:table-row table:style-name="ro1">
          <table:table-cell office:value-type="string" calcext:value-type="string">
            <text:p>end_period</text:p>
          </table:table-cell>
          <table:table-cell office:value-type="string" calcext:value-type="string">
            <text:p>Report end period</text:p>
          </table:table-cell>
        </table:table-row>
        <table:table-row table:style-name="ro1">
          <table:table-cell office:value-type="string" calcext:value-type="string">
            <text:p>report_period_notes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/>
        </table:table-row>
        <table:table-row table:style-name="ro1">
          <table:table-cell office:value-type="string" calcext:value-type="string">
            <text:p>currency</text:p>
          </table:table-cell>
          <table:table-cell/>
        </table:table-row>
        <table:table-row table:style-name="ro1">
          <table:table-cell office:value-type="string" calcext:value-type="string">
            <text:p>employment_status</text:p>
          </table:table-cell>
          <table:table-cell office:value-type="string" calcext:value-type="string">
            <text:p>Part time or full time status of the adjudicator, pertaining to the amount of time they are available to the ORHT/LTB, not necessarily to their actual employment status</text:p>
          </table:table-cell>
        </table:table-row>
        <table:table-row table:style-name="ro1">
          <table:table-cell office:value-type="string" calcext:value-type="string">
            <text:p>region_id</text:p>
          </table:table-cell>
          <table:table-cell office:value-type="string" calcext:value-type="string">
            <text:p>Report region, Central, Northern, Eastern, Southern, Southwestern, Toronto North, Toronto East, Toronto South</text:p>
          </table:table-cell>
        </table:table-row>
        <table:table-row table:style-name="ro1">
          <table:table-cell office:value-type="string" calcext:value-type="string">
            <text:p>app_code</text:p>
          </table:table-cell>
          <table:table-cell office:value-type="string" calcext:value-type="string">
            <text:p>Code of the application to the ORHT/LTB</text:p>
          </table:table-cell>
        </table:table-row>
        <table:table-row table:style-name="ro1">
          <table:table-cell office:value-type="string" calcext:value-type="string">
            <text:p>first_year</text:p>
          </table:table-cell>
          <table:table-cell office:value-type="string" calcext:value-type="string">
            <text:p>First year application type was reported on </text:p>
          </table:table-cell>
        </table:table-row>
        <table:table-row table:style-name="ro1">
          <table:table-cell office:value-type="string" calcext:value-type="string">
            <text:p>last_year</text:p>
          </table:table-cell>
          <table:table-cell office:value-type="string" calcext:value-type="string">
            <text:p>Last year application type was reported on</text:p>
          </table:table-cell>
        </table:table-row>
        <table:table-row table:style-name="ro1">
          <table:table-cell office:value-type="string" calcext:value-type="string">
            <text:p>applicant_type</text:p>
          </table:table-cell>
          <table:table-cell office:value-type="string" calcext:value-type="string">
            <text:p>Type of applicant: landlord, tenant or combined landlord and tenant</text:p>
          </table:table-cell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Assuming this means the number of applications the ORHT/LTB received</text:p>
          </table:table-cell>
        </table:table-row>
        <table:table-row table:style-name="ro1">
          <table:table-cell office:value-type="string" calcext:value-type="string">
            <text:p>defaults</text:p>
          </table:table-cell>
          <table:table-cell office:value-type="string" calcext:value-type="string">
            <text:p>Assuming this means the number of applications withdrawn or otherwise resolved without a hearing</text:p>
          </table:table-cell>
        </table:table-row>
        <table:table-row table:style-name="ro1">
          <table:table-cell office:value-type="string" calcext:value-type="string">
            <text:p>hearings</text:p>
          </table:table-cell>
          <table:table-cell office:value-type="string" calcext:value-type="string">
            <text:p>Applications heard in tribunal</text:p>
          </table:table-cell>
        </table:table-row>
      </table:table>
      <table:table table:name="metric_dict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number-columns-repeated="16379"/>
        <table:table-row table:style-name="ro1">
          <table:table-cell office:value-type="string" calcext:value-type="string">
            <text:p>metric_id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notes</text:p>
          </table:table-cell>
          <table:table-cell/>
          <table:table-cell table:style-name="ce3" office:value-type="string" calcext:value-type="string">
            <text:p>Uploaded to GitHub May 9 or 10, updated May 11 (each update will be separated by a solid line)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total_received</text:p>
          </table:table-cell>
          <table:table-cell office:value-type="string" calcext:value-type="string">
            <text:p>Applications received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total_resolved</text:p>
          </table:table-cell>
          <table:table-cell office:value-type="string" calcext:value-type="string">
            <text:p>Applications resolved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total_unresolved</text:p>
          </table:table-cell>
          <table:table-cell office:value-type="string" calcext:value-type="string">
            <text:p>Unresolved applications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cost_filing</text:p>
          </table:table-cell>
          <table:table-cell office:value-type="string" calcext:value-type="string">
            <text:p>Cost of filing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cost_filing_tenant</text:p>
          </table:table-cell>
          <table:table-cell office:value-type="string" calcext:value-type="string">
            <text:p>Cost of filing for the tenant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budget_expenditures</text:p>
          </table:table-cell>
          <table:table-cell office:value-type="string" calcext:value-type="string">
            <text:p>Budget expenditures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salaries_wages</text:p>
          </table:table-cell>
          <table:table-cell office:value-type="string" calcext:value-type="string">
            <text:p>Salaries and wages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other_expenses</text:p>
          </table:table-cell>
          <table:table-cell office:value-type="string" calcext:value-type="string">
            <text:p>Other direct operating expenses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benefits</text:p>
          </table:table-cell>
          <table:table-cell office:value-type="string" calcext:value-type="string">
            <text:p>Benefits (paid to employees)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venue</text:p>
          </table:table-cell>
          <table:table-cell office:value-type="string" calcext:value-type="string">
            <text:p>Revenue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adjudicators_FT</text:p>
          </table:table-cell>
          <table:table-cell office:value-type="string" calcext:value-type="string">
            <text:p>Full time adjudicators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adjudicators_PT</text:p>
          </table:table-cell>
          <table:table-cell office:value-type="string" calcext:value-type="string">
            <text:p>Part time adjudicators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Staff (assuming administrative and customer service)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adjudicators_FTE</text:p>
          </table:table-cell>
          <table:table-cell office:value-type="string" calcext:value-type="string">
            <text:p>Full time equivalent number of adjudicators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staff_FTE</text:p>
          </table:table-cell>
          <table:table-cell office:value-type="string" calcext:value-type="string">
            <text:p>Full time equivalent number of staff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gion_central</text:p>
          </table:table-cell>
          <table:table-cell office:value-type="string" calcext:value-type="string">
            <text:p>Central region (see map)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gion_eastern</text:p>
          </table:table-cell>
          <table:table-cell office:value-type="string" calcext:value-type="string">
            <text:p>Eastern region (see map)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gion_northern</text:p>
          </table:table-cell>
          <table:table-cell office:value-type="string" calcext:value-type="string">
            <text:p>Northern region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gion_southern</text:p>
          </table:table-cell>
          <table:table-cell office:value-type="string" calcext:value-type="string">
            <text:p>Southern region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gion_southwestern</text:p>
          </table:table-cell>
          <table:table-cell office:value-type="string" calcext:value-type="string">
            <text:p>Southwestern region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gion_torontoNorth</text:p>
          </table:table-cell>
          <table:table-cell office:value-type="string" calcext:value-type="string">
            <text:p>Toronto North region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gion_torontoEast</text:p>
          </table:table-cell>
          <table:table-cell office:value-type="string" calcext:value-type="string">
            <text:p>Toronto East region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gion_torontoSouth</text:p>
          </table:table-cell>
          <table:table-cell office:value-type="string" calcext:value-type="string">
            <text:p>Toronto South region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landlord_received</text:p>
          </table:table-cell>
          <table:table-cell office:value-type="string" calcext:value-type="string">
            <text:p>Applications received from landlords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tenant_received</text:p>
          </table:table-cell>
          <table:table-cell office:value-type="string" calcext:value-type="string">
            <text:p>Applications received from tenants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solved_abandoned</text:p>
          </table:table-cell>
          <table:table-cell office:value-type="string" calcext:value-type="string">
            <text:p>Ordered by hearing abandoned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solved_mediation</text:p>
          </table:table-cell>
          <table:table-cell office:value-type="string" calcext:value-type="string">
            <text:p>Mediated; ordered by hearing mediated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solved_hearing</text:p>
          </table:table-cell>
          <table:table-cell office:value-type="string" calcext:value-type="string">
            <text:p>Ordered by hearing contested or uncontested; ordered by review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solved_wo_hearing</text:p>
          </table:table-cell>
          <table:table-cell office:value-type="string" calcext:value-type="string">
            <text:p>Ordered ex parte; ordered by section 206 agreement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view_submitted</text:p>
          </table:table-cell>
          <table:table-cell office:value-type="string" calcext:value-type="string">
            <text:p>Case submitted for review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view_denied</text:p>
          </table:table-cell>
          <table:table-cell office:value-type="string" calcext:value-type="string">
            <text:p>Case review denied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view_sentHearing</text:p>
          </table:table-cell>
          <table:table-cell office:value-type="string" calcext:value-type="string">
            <text:p>Review sent to a hearing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solved_withdrawn</text:p>
          </table:table-cell>
          <table:table-cell office:value-type="string" calcext:value-type="string">
            <text:p>Case resolved through withdrawal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solved_other</text:p>
          </table:table-cell>
          <table:table-cell office:value-type="string" calcext:value-type="string">
            <text:p>Discontinued; order voided; ordered amended; amendment denied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mediation_attempted</text:p>
          </table:table-cell>
          <table:table-cell office:value-type="string" calcext:value-type="string">
            <text:p>Attempted mediation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mediation_rate</text:p>
          </table:table-cell>
          <table:table-cell office:value-type="string" calcext:value-type="string">
            <text:p>Portion of cases resolved through mediation</text:p>
          </table:table-cell>
          <table:table-cell table:number-columns-repeated="3"/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esolved_withdrawn_mediation</text:p>
          </table:table-cell>
          <table:table-cell table:style-name="ce1" office:value-type="string" calcext:value-type="string">
            <text:p>Number of cases withdrawn due to mediation</text:p>
          </table:table-cell>
          <table:table-cell table:style-name="ce1"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additional_staff</text:p>
          </table:table-cell>
          <table:table-cell office:value-type="string" calcext:value-type="string">
            <text:p>Additional staff members 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table:style-name="ce5" office:value-type="string" calcext:value-type="string">
            <text:p>canonical_names_found</text:p>
          </table:table-cell>
          <table:table-cell office:value-type="string" calcext:value-type="string">
            <text:p>Number of canonical adjudicator names found in report</text:p>
          </table:table-cell>
          <table:table-cell table:number-columns-repeated="3"/>
          <table:table-cell table:style-name="ce1" table:number-columns-repeated="16379"/>
        </table:table-row>
        <table:table-row table:style-name="ro1">
          <table:table-cell table:style-name="ce8" office:value-type="string" calcext:value-type="string">
            <text:p>part_time_names_found</text:p>
          </table:table-cell>
          <table:table-cell table:style-name="ce1" office:value-type="string" calcext:value-type="string">
            <text:p>Number of canonical adjudicator names followed by “(Part Time member)” or some variant</text:p>
          </table:table-cell>
          <table:table-cell table:style-name="ce1"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Number of occurrences of a particular application type (ex. A3, L4, T3 etc)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defaults</text:p>
          </table:table-cell>
          <table:table-cell office:value-type="string" calcext:value-type="string">
            <text:p>Number of defaults of a particular application type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hearings</text:p>
          </table:table-cell>
          <table:table-cell office:value-type="string" calcext:value-type="string">
            <text:p>Number of hearings of a particular application type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string" calcext:value-type="string">
            <text:p>hearing_time_min</text:p>
          </table:table-cell>
          <table:table-cell office:value-type="string" calcext:value-type="string">
            <text:p>Length of time of a hearing in minutes</text:p>
          </table:table-cell>
          <table:table-cell table:number-columns-repeated="3"/>
          <table:table-cell table:style-name="Default" table:number-columns-repeated="16379"/>
        </table:table-row>
      </table:table>
      <table:table table:name="GH_operational_metric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port_id</text:p>
          </table:table-cell>
          <table:table-cell office:value-type="string" calcext:value-type="string">
            <text:p>metric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total_received</text:p>
          </table:table-cell>
          <table:table-cell office:value-type="float" office:value="59894" calcext:value-type="float">
            <text:p>5989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Forecast 65000 applications</text:p>
          </table:table-cell>
          <table:table-cell table:style-name="ce3" office:value-type="string" calcext:value-type="string">
            <text:p>Uploaded to GitHub May 9 or 10<text:span text:style-name="T1">th</text:span></text:p>
          </table:table-cell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otal_received</text:p>
          </table:table-cell>
          <table:table-cell office:value-type="float" office:value="70181" calcext:value-type="float">
            <text:p>70181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otal_received</text:p>
          </table:table-cell>
          <table:table-cell office:value-type="float" office:value="73931" calcext:value-type="float">
            <text:p>73931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otal_received</text:p>
          </table:table-cell>
          <table:table-cell office:value-type="float" office:value="77104" calcext:value-type="float">
            <text:p>77104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otal_received</text:p>
          </table:table-cell>
          <table:table-cell office:value-type="float" office:value="68118" calcext:value-type="float">
            <text:p>68118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otal_received</text:p>
          </table:table-cell>
          <table:table-cell office:value-type="float" office:value="70004" calcext:value-type="float">
            <text:p>70004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otal_received</text:p>
          </table:table-cell>
          <table:table-cell office:value-type="float" office:value="74867" calcext:value-type="float">
            <text:p>74867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otal_received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otal_received</text:p>
          </table:table-cell>
          <table:table-cell office:value-type="float" office:value="79701" calcext:value-type="float">
            <text:p>79701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otal_received</text:p>
          </table:table-cell>
          <table:table-cell office:value-type="float" office:value="80552" calcext:value-type="float">
            <text:p>80552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otal_received</text:p>
          </table:table-cell>
          <table:table-cell office:value-type="float" office:value="85840" calcext:value-type="float">
            <text:p>85840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otal_received</text:p>
          </table:table-cell>
          <table:table-cell office:value-type="float" office:value="78072" calcext:value-type="float">
            <text:p>78072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otal_received</text:p>
          </table:table-cell>
          <table:table-cell office:value-type="float" office:value="77393" calcext:value-type="float">
            <text:p>77393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otal_received</text:p>
          </table:table-cell>
          <table:table-cell office:value-type="float" office:value="81084" calcext:value-type="float">
            <text:p>81084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otal_received</text:p>
          </table:table-cell>
          <table:table-cell office:value-type="float" office:value="82192" calcext:value-type="float">
            <text:p>82192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otal_received</text:p>
          </table:table-cell>
          <table:table-cell office:value-type="float" office:value="81748" calcext:value-type="float">
            <text:p>81748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otal_received</text:p>
          </table:table-cell>
          <table:table-cell office:value-type="float" office:value="79740" calcext:value-type="float">
            <text:p>79740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otal_received</text:p>
          </table:table-cell>
          <table:table-cell office:value-type="float" office:value="80214" calcext:value-type="float">
            <text:p>80214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otal_received</text:p>
          </table:table-cell>
          <table:table-cell office:value-type="float" office:value="81432" calcext:value-type="float">
            <text:p>81432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otal_received</text:p>
          </table:table-cell>
          <table:table-cell office:value-type="float" office:value="80791" calcext:value-type="float">
            <text:p>80791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otal_received</text:p>
          </table:table-cell>
          <table:table-cell office:value-type="float" office:value="82095" calcext:value-type="float">
            <text:p>82095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otal_received</text:p>
          </table:table-cell>
          <table:table-cell office:value-type="float" office:value="80874" calcext:value-type="float">
            <text:p>80874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otal_received</text:p>
          </table:table-cell>
          <table:table-cell office:value-type="float" office:value="48422" calcext:value-type="float">
            <text:p>48422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otal_received</text:p>
          </table:table-cell>
          <table:table-cell office:value-type="float" office:value="61705" calcext:value-type="float">
            <text:p>61705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otal_received</text:p>
          </table:table-cell>
          <table:table-cell office:value-type="float" office:value="73406" calcext:value-type="float">
            <text:p>73406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otal_received</text:p>
          </table:table-cell>
          <table:table-cell office:value-type="float" office:value="82285" calcext:value-type="float">
            <text:p>82285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otal_received</text:p>
          </table:table-cell>
          <table:table-cell office:value-type="float" office:value="87993" calcext:value-type="float">
            <text:p>87993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otal_resolved</text:p>
          </table:table-cell>
          <table:table-cell office:value-type="float" office:value="70862" calcext:value-type="float">
            <text:p>70862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otal_resolved</text:p>
          </table:table-cell>
          <table:table-cell office:value-type="float" office:value="76946" calcext:value-type="float">
            <text:p>76946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otal_resolved</text:p>
          </table:table-cell>
          <table:table-cell office:value-type="float" office:value="78285" calcext:value-type="float">
            <text:p>78285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otal_resolved</text:p>
          </table:table-cell>
          <table:table-cell office:value-type="float" office:value="68505" calcext:value-type="float">
            <text:p>68505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otal_resolved</text:p>
          </table:table-cell>
          <table:table-cell office:value-type="float" office:value="71668" calcext:value-type="float">
            <text:p>71668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otal_resolved</text:p>
          </table:table-cell>
          <table:table-cell office:value-type="float" office:value="70527" calcext:value-type="float">
            <text:p>70527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otal_resolved</text:p>
          </table:table-cell>
          <table:table-cell office:value-type="float" office:value="87977" calcext:value-type="float">
            <text:p>87977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otal_resolved</text:p>
          </table:table-cell>
          <table:table-cell office:value-type="float" office:value="77306" calcext:value-type="float">
            <text:p>77306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otal_resolved</text:p>
          </table:table-cell>
          <table:table-cell office:value-type="float" office:value="78175" calcext:value-type="float">
            <text:p>78175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otal_resolved</text:p>
          </table:table-cell>
          <table:table-cell office:value-type="float" office:value="78783" calcext:value-type="float">
            <text:p>78783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otal_resolved</text:p>
          </table:table-cell>
          <table:table-cell office:value-type="float" office:value="78744" calcext:value-type="float">
            <text:p>78744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otal_resolved</text:p>
          </table:table-cell>
          <table:table-cell office:value-type="float" office:value="79476" calcext:value-type="float">
            <text:p>79476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otal_resolved</text:p>
          </table:table-cell>
          <table:table-cell office:value-type="float" office:value="72064" calcext:value-type="float">
            <text:p>72064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otal_resolved</text:p>
          </table:table-cell>
          <table:table-cell office:value-type="float" office:value="35983" calcext:value-type="float">
            <text:p>35983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otal_resolved</text:p>
          </table:table-cell>
          <table:table-cell office:value-type="float" office:value="61868" calcext:value-type="float">
            <text:p>61868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otal_resolved</text:p>
          </table:table-cell>
          <table:table-cell office:value-type="float" office:value="52986" calcext:value-type="float">
            <text:p>52986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otal_resolved</text:p>
          </table:table-cell>
          <table:table-cell office:value-type="float" office:value="88307" calcext:value-type="float">
            <text:p>88307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otal_resolved</text:p>
          </table:table-cell>
          <table:table-cell office:value-type="float" office:value="108146" calcext:value-type="float">
            <text:p>108146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otal_unresolved</text:p>
          </table:table-cell>
          <table:table-cell office:value-type="float" office:value="11946" calcext:value-type="float">
            <text:p>11946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includes co-op cases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otal_unresolved</text:p>
          </table:table-cell>
          <table:table-cell office:value-type="float" office:value="13899" calcext:value-type="float">
            <text:p>13899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otal_unresolved</text:p>
          </table:table-cell>
          <table:table-cell office:value-type="float" office:value="12944" calcext:value-type="float">
            <text:p>12944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otal_unresolved</text:p>
          </table:table-cell>
          <table:table-cell office:value-type="float" office:value="14726" calcext:value-type="float">
            <text:p>14726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otal_unresolved</text:p>
          </table:table-cell>
          <table:table-cell office:value-type="float" office:value="22803" calcext:value-type="float">
            <text:p>22803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31% increase in submissions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otal_unresolved</text:p>
          </table:table-cell>
          <table:table-cell office:value-type="float" office:value="34731" calcext:value-type="float">
            <text:p>34731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31% increase in submissions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otal_unresolved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31% increase in submissions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otal_unresolved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otal_unresolved</text:p>
          </table:table-cell>
          <table:table-cell office:value-type="float" office:value="53030" calcext:value-type="float">
            <text:p>53030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otal_unresolved</text:p>
          </table:table-cell>
          <table:table-cell office:value-type="float" office:value="41465" calcext:value-type="float">
            <text:p>41465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</table:table>
      <table:table table:name="Pivot Table_operational_metrics" table:style-name="ta1">
        <office:forms form:automatic-focus="false" form:apply-design-mode="false"/>
        <table:shapes>
          <draw:frame draw:z-index="0" draw:style-name="gr1" draw:text-style-name="P1" svg:width="16.01cm" svg:height="9.009cm" svg:x="11.54cm" svg:y="0.384c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1" table:default-cell-style-name="ce17"/>
        <table:table-column table:style-name="co1" table:default-cell-style-name="Pivot_20_Table_20_Value"/>
        <table:table-column table:style-name="co1" table:default-cell-style-name="ce26"/>
        <table:table-column table:style-name="co1" table:default-cell-style-name="ce32"/>
        <table:table-row table:style-name="ro1">
          <table:table-cell table:style-name="ce9" office:value-type="string" calcext:value-type="string">
            <text:p>Sum - value</text:p>
          </table:table-cell>
          <table:table-cell table:style-name="ce14" office:value-type="string" calcext:value-type="string">
            <text:p>metric_id</text:p>
          </table:table-cell>
          <table:table-cell table:style-name="ce20" table:number-columns-repeated="2"/>
          <table:table-cell table:style-name="ce29"/>
        </table:table-row>
        <table:table-row table:style-name="ro1">
          <table:table-cell table:style-name="ce10" office:value-type="string" calcext:value-type="string">
            <text:p>report_id</text:p>
          </table:table-cell>
          <table:table-cell table:style-name="ce15" office:value-type="string" calcext:value-type="string">
            <text:p>total_received</text:p>
          </table:table-cell>
          <table:table-cell table:style-name="ce21" office:value-type="string" calcext:value-type="string">
            <text:p>total_resolved</text:p>
          </table:table-cell>
          <table:table-cell table:style-name="ce21" office:value-type="string" calcext:value-type="string">
            <text:p>total_unresolved</text:p>
          </table:table-cell>
          <table:table-cell table:style-name="ce30" office:value-type="string" calcext:value-type="string">
            <text:p>Total Result</text:p>
          </table:table-cell>
        </table:table-row>
        <table:table-row table:style-name="ro1">
          <table:table-cell table:style-name="ce11" office:value-type="string" calcext:value-type="string">
            <text:p>1998_1999</text:p>
          </table:table-cell>
          <table:table-cell table:style-name="ce16" office:value-type="float" office:value="59894" calcext:value-type="float">
            <text:p>59894</text:p>
          </table:table-cell>
          <table:table-cell table:style-name="ce22"/>
          <table:table-cell table:style-name="ce25"/>
          <table:table-cell table:style-name="ce31" office:value-type="float" office:value="59894" calcext:value-type="float">
            <text:p>59894</text:p>
          </table:table-cell>
        </table:table-row>
        <table:table-row table:style-name="ro1">
          <table:table-cell office:value-type="string" calcext:value-type="string">
            <text:p>1999_2000</text:p>
          </table:table-cell>
          <table:table-cell office:value-type="float" office:value="70181" calcext:value-type="float">
            <text:p>70181</text:p>
          </table:table-cell>
          <table:table-cell office:value-type="float" office:value="70862" calcext:value-type="float">
            <text:p>70862</text:p>
          </table:table-cell>
          <table:table-cell/>
          <table:table-cell office:value-type="float" office:value="141043" calcext:value-type="float">
            <text:p>141043</text:p>
          </table:table-cell>
        </table:table-row>
        <table:table-row table:style-name="ro1">
          <table:table-cell office:value-type="string" calcext:value-type="string">
            <text:p>2000_2001</text:p>
          </table:table-cell>
          <table:table-cell office:value-type="float" office:value="73931" calcext:value-type="float">
            <text:p>73931</text:p>
          </table:table-cell>
          <table:table-cell office:value-type="float" office:value="76946" calcext:value-type="float">
            <text:p>76946</text:p>
          </table:table-cell>
          <table:table-cell/>
          <table:table-cell office:value-type="float" office:value="150877" calcext:value-type="float">
            <text:p>150877</text:p>
          </table:table-cell>
        </table:table-row>
        <table:table-row table:style-name="ro1">
          <table:table-cell office:value-type="string" calcext:value-type="string">
            <text:p>2001_2002</text:p>
          </table:table-cell>
          <table:table-cell office:value-type="float" office:value="77104" calcext:value-type="float">
            <text:p>77104</text:p>
          </table:table-cell>
          <table:table-cell office:value-type="float" office:value="78285" calcext:value-type="float">
            <text:p>78285</text:p>
          </table:table-cell>
          <table:table-cell/>
          <table:table-cell office:value-type="float" office:value="155389" calcext:value-type="float">
            <text:p>155389</text:p>
          </table:table-cell>
        </table:table-row>
        <table:table-row table:style-name="ro1">
          <table:table-cell office:value-type="string" calcext:value-type="string">
            <text:p>2002_2003</text:p>
          </table:table-cell>
          <table:table-cell office:value-type="float" office:value="68118" calcext:value-type="float">
            <text:p>68118</text:p>
          </table:table-cell>
          <table:table-cell office:value-type="float" office:value="68505" calcext:value-type="float">
            <text:p>68505</text:p>
          </table:table-cell>
          <table:table-cell/>
          <table:table-cell office:value-type="float" office:value="136623" calcext:value-type="float">
            <text:p>136623</text:p>
          </table:table-cell>
        </table:table-row>
        <table:table-row table:style-name="ro1">
          <table:table-cell office:value-type="string" calcext:value-type="string">
            <text:p>2003_2004</text:p>
          </table:table-cell>
          <table:table-cell office:value-type="float" office:value="70004" calcext:value-type="float">
            <text:p>70004</text:p>
          </table:table-cell>
          <table:table-cell office:value-type="float" office:value="71668" calcext:value-type="float">
            <text:p>71668</text:p>
          </table:table-cell>
          <table:table-cell/>
          <table:table-cell office:value-type="float" office:value="141672" calcext:value-type="float">
            <text:p>141672</text:p>
          </table:table-cell>
        </table:table-row>
        <table:table-row table:style-name="ro1">
          <table:table-cell office:value-type="string" calcext:value-type="string">
            <text:p>2004_2005</text:p>
          </table:table-cell>
          <table:table-cell office:value-type="float" office:value="74867" calcext:value-type="float">
            <text:p>74867</text:p>
          </table:table-cell>
          <table:table-cell office:value-type="float" office:value="70527" calcext:value-type="float">
            <text:p>70527</text:p>
          </table:table-cell>
          <table:table-cell/>
          <table:table-cell office:value-type="float" office:value="145394" calcext:value-type="float">
            <text:p>145394</text:p>
          </table:table-cell>
        </table:table-row>
        <table:table-row table:style-name="ro1">
          <table:table-cell office:value-type="string" calcext:value-type="string">
            <text:p>2005_2006</text:p>
          </table:table-cell>
          <table:table-cell office:value-type="float" office:value="81000" calcext:value-type="float">
            <text:p>81000</text:p>
          </table:table-cell>
          <table:table-cell office:value-type="float" office:value="87977" calcext:value-type="float">
            <text:p>87977</text:p>
          </table:table-cell>
          <table:table-cell/>
          <table:table-cell office:value-type="float" office:value="168977" calcext:value-type="float">
            <text:p>168977</text:p>
          </table:table-cell>
        </table:table-row>
        <table:table-row table:style-name="ro1">
          <table:table-cell office:value-type="string" calcext:value-type="string">
            <text:p>2006_2007</text:p>
          </table:table-cell>
          <table:table-cell office:value-type="float" office:value="79701" calcext:value-type="float">
            <text:p>79701</text:p>
          </table:table-cell>
          <table:table-cell table:number-columns-repeated="2"/>
          <table:table-cell office:value-type="float" office:value="79701" calcext:value-type="float">
            <text:p>79701</text:p>
          </table:table-cell>
        </table:table-row>
        <table:table-row table:style-name="ro1">
          <table:table-cell office:value-type="string" calcext:value-type="string">
            <text:p>2007_2008</text:p>
          </table:table-cell>
          <table:table-cell office:value-type="float" office:value="80552" calcext:value-type="float">
            <text:p>80552</text:p>
          </table:table-cell>
          <table:table-cell table:number-columns-repeated="2"/>
          <table:table-cell office:value-type="float" office:value="80552" calcext:value-type="float">
            <text:p>80552</text:p>
          </table:table-cell>
        </table:table-row>
        <table:table-row table:style-name="ro1">
          <table:table-cell office:value-type="string" calcext:value-type="string">
            <text:p>2008_2009</text:p>
          </table:table-cell>
          <table:table-cell office:value-type="float" office:value="85840" calcext:value-type="float">
            <text:p>85840</text:p>
          </table:table-cell>
          <table:table-cell table:number-columns-repeated="2"/>
          <table:table-cell office:value-type="float" office:value="85840" calcext:value-type="float">
            <text:p>85840</text:p>
          </table:table-cell>
        </table:table-row>
        <table:table-row table:style-name="ro1">
          <table:table-cell office:value-type="string" calcext:value-type="string">
            <text:p>2009_2010</text:p>
          </table:table-cell>
          <table:table-cell office:value-type="float" office:value="78072" calcext:value-type="float">
            <text:p>78072</text:p>
          </table:table-cell>
          <table:table-cell table:number-columns-repeated="2"/>
          <table:table-cell office:value-type="float" office:value="78072" calcext:value-type="float">
            <text:p>78072</text:p>
          </table:table-cell>
        </table:table-row>
        <table:table-row table:style-name="ro1">
          <table:table-cell office:value-type="string" calcext:value-type="string">
            <text:p>2010_2011</text:p>
          </table:table-cell>
          <table:table-cell office:value-type="float" office:value="77393" calcext:value-type="float">
            <text:p>77393</text:p>
          </table:table-cell>
          <table:table-cell table:number-columns-repeated="2"/>
          <table:table-cell office:value-type="float" office:value="77393" calcext:value-type="float">
            <text:p>77393</text:p>
          </table:table-cell>
        </table:table-row>
        <table:table-row table:style-name="ro1">
          <table:table-cell office:value-type="string" calcext:value-type="string">
            <text:p>2011_2012</text:p>
          </table:table-cell>
          <table:table-cell office:value-type="float" office:value="81084" calcext:value-type="float">
            <text:p>81084</text:p>
          </table:table-cell>
          <table:table-cell table:number-columns-repeated="2"/>
          <table:table-cell office:value-type="float" office:value="81084" calcext:value-type="float">
            <text:p>81084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float" office:value="82192" calcext:value-type="float">
            <text:p>82192</text:p>
          </table:table-cell>
          <table:table-cell table:number-columns-repeated="2"/>
          <table:table-cell office:value-type="float" office:value="82192" calcext:value-type="float">
            <text:p>82192</text:p>
          </table:table-cell>
        </table:table-row>
        <table:table-row table:style-name="ro1">
          <table:table-cell office:value-type="string" calcext:value-type="string">
            <text:p>2013_2014</text:p>
          </table:table-cell>
          <table:table-cell office:value-type="float" office:value="81748" calcext:value-type="float">
            <text:p>81748</text:p>
          </table:table-cell>
          <table:table-cell table:number-columns-repeated="2"/>
          <table:table-cell office:value-type="float" office:value="81748" calcext:value-type="float">
            <text:p>81748</text:p>
          </table:table-cell>
        </table:table-row>
        <table:table-row table:style-name="ro1">
          <table:table-cell office:value-type="string" calcext:value-type="string">
            <text:p>2014_2015</text:p>
          </table:table-cell>
          <table:table-cell office:value-type="float" office:value="79740" calcext:value-type="float">
            <text:p>79740</text:p>
          </table:table-cell>
          <table:table-cell office:value-type="float" office:value="77306" calcext:value-type="float">
            <text:p>77306</text:p>
          </table:table-cell>
          <table:table-cell/>
          <table:table-cell office:value-type="float" office:value="157046" calcext:value-type="float">
            <text:p>157046</text:p>
          </table:table-cell>
        </table:table-row>
        <table:table-row table:style-name="ro1">
          <table:table-cell office:value-type="string" calcext:value-type="string">
            <text:p>2015_2016</text:p>
          </table:table-cell>
          <table:table-cell office:value-type="float" office:value="80214" calcext:value-type="float">
            <text:p>80214</text:p>
          </table:table-cell>
          <table:table-cell office:value-type="float" office:value="78175" calcext:value-type="float">
            <text:p>78175</text:p>
          </table:table-cell>
          <table:table-cell office:value-type="float" office:value="11946" calcext:value-type="float">
            <text:p>11946</text:p>
          </table:table-cell>
          <table:table-cell office:value-type="float" office:value="170335" calcext:value-type="float">
            <text:p>170335</text:p>
          </table:table-cell>
        </table:table-row>
        <table:table-row table:style-name="ro1">
          <table:table-cell office:value-type="string" calcext:value-type="string">
            <text:p>2016_2017</text:p>
          </table:table-cell>
          <table:table-cell office:value-type="float" office:value="81432" calcext:value-type="float">
            <text:p>81432</text:p>
          </table:table-cell>
          <table:table-cell office:value-type="float" office:value="78783" calcext:value-type="float">
            <text:p>78783</text:p>
          </table:table-cell>
          <table:table-cell office:value-type="float" office:value="13899" calcext:value-type="float">
            <text:p>13899</text:p>
          </table:table-cell>
          <table:table-cell office:value-type="float" office:value="174114" calcext:value-type="float">
            <text:p>174114</text:p>
          </table:table-cell>
        </table:table-row>
        <table:table-row table:style-name="ro1">
          <table:table-cell office:value-type="string" calcext:value-type="string">
            <text:p>2017_2018</text:p>
          </table:table-cell>
          <table:table-cell office:value-type="float" office:value="80791" calcext:value-type="float">
            <text:p>80791</text:p>
          </table:table-cell>
          <table:table-cell office:value-type="float" office:value="78744" calcext:value-type="float">
            <text:p>78744</text:p>
          </table:table-cell>
          <table:table-cell office:value-type="float" office:value="12944" calcext:value-type="float">
            <text:p>12944</text:p>
          </table:table-cell>
          <table:table-cell office:value-type="float" office:value="172479" calcext:value-type="float">
            <text:p>172479</text:p>
          </table:table-cell>
        </table:table-row>
        <table:table-row table:style-name="ro1">
          <table:table-cell office:value-type="string" calcext:value-type="string">
            <text:p>2018_2019</text:p>
          </table:table-cell>
          <table:table-cell office:value-type="float" office:value="82095" calcext:value-type="float">
            <text:p>82095</text:p>
          </table:table-cell>
          <table:table-cell office:value-type="float" office:value="79476" calcext:value-type="float">
            <text:p>79476</text:p>
          </table:table-cell>
          <table:table-cell office:value-type="float" office:value="14726" calcext:value-type="float">
            <text:p>14726</text:p>
          </table:table-cell>
          <table:table-cell office:value-type="float" office:value="176297" calcext:value-type="float">
            <text:p>176297</text:p>
          </table:table-cell>
        </table:table-row>
        <table:table-row table:style-name="ro1">
          <table:table-cell office:value-type="string" calcext:value-type="string">
            <text:p>2019_2020</text:p>
          </table:table-cell>
          <table:table-cell office:value-type="float" office:value="80874" calcext:value-type="float">
            <text:p>80874</text:p>
          </table:table-cell>
          <table:table-cell office:value-type="float" office:value="72064" calcext:value-type="float">
            <text:p>72064</text:p>
          </table:table-cell>
          <table:table-cell office:value-type="float" office:value="22803" calcext:value-type="float">
            <text:p>22803</text:p>
          </table:table-cell>
          <table:table-cell office:value-type="float" office:value="175741" calcext:value-type="float">
            <text:p>175741</text:p>
          </table:table-cell>
        </table:table-row>
        <table:table-row table:style-name="ro1">
          <table:table-cell office:value-type="string" calcext:value-type="string">
            <text:p>2020_2021</text:p>
          </table:table-cell>
          <table:table-cell office:value-type="float" office:value="48422" calcext:value-type="float">
            <text:p>48422</text:p>
          </table:table-cell>
          <table:table-cell office:value-type="float" office:value="35983" calcext:value-type="float">
            <text:p>35983</text:p>
          </table:table-cell>
          <table:table-cell office:value-type="float" office:value="34731" calcext:value-type="float">
            <text:p>34731</text:p>
          </table:table-cell>
          <table:table-cell office:value-type="float" office:value="119136" calcext:value-type="float">
            <text:p>119136</text:p>
          </table:table-cell>
        </table:table-row>
        <table:table-row table:style-name="ro1">
          <table:table-cell office:value-type="string" calcext:value-type="string">
            <text:p>2021_2022</text:p>
          </table:table-cell>
          <table:table-cell office:value-type="float" office:value="61705" calcext:value-type="float">
            <text:p>61705</text:p>
          </table:table-cell>
          <table:table-cell office:value-type="float" office:value="61868" calcext:value-type="float">
            <text:p>61868</text:p>
          </table:table-cell>
          <table:table-cell office:value-type="float" office:value="32800" calcext:value-type="float">
            <text:p>32800</text:p>
          </table:table-cell>
          <table:table-cell office:value-type="float" office:value="156373" calcext:value-type="float">
            <text:p>156373</text:p>
          </table:table-cell>
        </table:table-row>
        <table:table-row table:style-name="ro1">
          <table:table-cell office:value-type="string" calcext:value-type="string">
            <text:p>2022_2023</text:p>
          </table:table-cell>
          <table:table-cell office:value-type="float" office:value="73406" calcext:value-type="float">
            <text:p>73406</text:p>
          </table:table-cell>
          <table:table-cell office:value-type="float" office:value="52986" calcext:value-type="float">
            <text:p>52986</text:p>
          </table:table-cell>
          <table:table-cell office:value-type="float" office:value="53057" calcext:value-type="float">
            <text:p>53057</text:p>
          </table:table-cell>
          <table:table-cell office:value-type="float" office:value="179449" calcext:value-type="float">
            <text:p>179449</text:p>
          </table:table-cell>
        </table:table-row>
        <table:table-row table:style-name="ro1">
          <table:table-cell office:value-type="string" calcext:value-type="string">
            <text:p>2023_2024</text:p>
          </table:table-cell>
          <table:table-cell office:value-type="float" office:value="82285" calcext:value-type="float">
            <text:p>82285</text:p>
          </table:table-cell>
          <table:table-cell office:value-type="float" office:value="88307" calcext:value-type="float">
            <text:p>88307</text:p>
          </table:table-cell>
          <table:table-cell office:value-type="float" office:value="53030" calcext:value-type="float">
            <text:p>53030</text:p>
          </table:table-cell>
          <table:table-cell office:value-type="float" office:value="223622" calcext:value-type="float">
            <text:p>223622</text:p>
          </table:table-cell>
        </table:table-row>
        <table:table-row table:style-name="ro1">
          <table:table-cell office:value-type="string" calcext:value-type="string">
            <text:p>2024_2025</text:p>
          </table:table-cell>
          <table:table-cell table:style-name="ce18" office:value-type="float" office:value="87993" calcext:value-type="float">
            <text:p>87993</text:p>
          </table:table-cell>
          <table:table-cell table:style-name="ce23" office:value-type="float" office:value="108146" calcext:value-type="float">
            <text:p>108146</text:p>
          </table:table-cell>
          <table:table-cell table:style-name="ce27" office:value-type="float" office:value="41465" calcext:value-type="float">
            <text:p>41465</text:p>
          </table:table-cell>
          <table:table-cell table:style-name="ce33" office:value-type="float" office:value="237604" calcext:value-type="float">
            <text:p>237604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9" office:value-type="float" office:value="2060638" calcext:value-type="float">
            <text:p>2060638</text:p>
          </table:table-cell>
          <table:table-cell table:style-name="ce24" office:value-type="float" office:value="1336608" calcext:value-type="float">
            <text:p>1336608</text:p>
          </table:table-cell>
          <table:table-cell table:style-name="ce28" office:value-type="float" office:value="291401" calcext:value-type="float">
            <text:p>291401</text:p>
          </table:table-cell>
          <table:table-cell table:style-name="ce34" office:value-type="float" office:value="3688647" calcext:value-type="float">
            <text:p>3688647</text:p>
          </table:table-cell>
        </table:table-row>
      </table:table>
      <table:table table:name="GH_financial_metrics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Uploaded to GH May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ort_id</text:p>
          </table:table-cell>
          <table:table-cell office:value-type="string" calcext:value-type="string">
            <text:p>metric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cost_fil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cost_filin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cost_filing_tena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budget_expenditures</text:p>
          </table:table-cell>
          <table:table-cell office:value-type="float" office:value="25700000" calcext:value-type="float">
            <text:p>2570000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salaries_wages</text:p>
          </table:table-cell>
          <table:table-cell office:value-type="float" office:value="17700000" calcext:value-type="float">
            <text:p>1770000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other_expenses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venue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budget_expenditures</text:p>
          </table:table-cell>
          <table:table-cell office:value-type="float" office:value="24900000" calcext:value-type="float">
            <text:p>2490000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salaries_wages</text:p>
          </table:table-cell>
          <table:table-cell office:value-type="float" office:value="19300000" calcext:value-type="float">
            <text:p>1930000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other_expenses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venue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budget_expenditures</text:p>
          </table:table-cell>
          <table:table-cell office:value-type="float" office:value="27870000" calcext:value-type="float">
            <text:p>2787000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salaries_wages</text:p>
          </table:table-cell>
          <table:table-cell office:value-type="float" office:value="16560000" calcext:value-type="float">
            <text:p>1656000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other_expenses</text:p>
          </table:table-cell>
          <table:table-cell office:value-type="float" office:value="8910000" calcext:value-type="float">
            <text:p>891000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venue</text:p>
          </table:table-cell>
          <table:table-cell office:value-type="float" office:value="11750000" calcext:value-type="float">
            <text:p>11750000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benefits</text:p>
          </table:table-cell>
          <table:table-cell office:value-type="float" office:value="2400000" calcext:value-type="float">
            <text:p>2400000</text:p>
          </table:table-cell>
          <table:table-cell office:value-type="string" calcext:value-type="string">
            <text:p>dollars</text:p>
          </table:table-cell>
          <table:table-cell/>
        </table:table-row>
      </table:table>
      <table:table table:name="GH_staffing_metrics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port_id</text:p>
          </table:table-cell>
          <table:table-cell office:value-type="string" calcext:value-type="string">
            <text:p>metric_id</text:p>
          </table:table-cell>
          <table:table-cell office:value-type="string" calcext:value-type="string">
            <text:p>employment_statu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98_1999</text:p>
          </table:table-cell>
          <table:table-cell table:style-name="ce5" office:value-type="string" calcext:value-type="string">
            <text:p>canonical_names_found</text:p>
          </table:table-cell>
          <table:table-cell office:value-type="string" calcext:value-type="string">
            <text:p>adjudicators_F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3"/>
          <table:table-cell table:style-name="ce3" office:value-type="string" calcext:value-type="string">
            <text:p>Uploaded to GH May 11</text:p>
          </table:table-cell>
        </table:table-row>
        <table:table-row table:style-name="ro1">
          <table:table-cell office:value-type="string" calcext:value-type="string">
            <text:p>1998_1999</text:p>
          </table:table-cell>
          <table:table-cell table:style-name="ce5" office:value-type="string" calcext:value-type="string">
            <text:p>part_time_names_found</text:p>
          </table:table-cell>
          <table:table-cell office:value-type="string" calcext:value-type="string">
            <text:p>adjudicators_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staff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“Staff and members” pg.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99_2000</text:p>
          </table:table-cell>
          <table:table-cell table:style-name="ce5" office:value-type="string" calcext:value-type="string">
            <text:p>canonical_names_found</text:p>
          </table:table-cell>
          <table:table-cell office:value-type="string" calcext:value-type="string">
            <text:p>adjudicators_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99_2000</text:p>
          </table:table-cell>
          <table:table-cell table:style-name="ce5" office:value-type="string" calcext:value-type="string">
            <text:p>part_time_names_found</text:p>
          </table:table-cell>
          <table:table-cell office:value-type="string" calcext:value-type="string">
            <text:p>adjudicators_P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_2001</text:p>
          </table:table-cell>
          <table:table-cell table:style-name="ce5" office:value-type="string" calcext:value-type="string">
            <text:p>canonical_names_found</text:p>
          </table:table-cell>
          <table:table-cell office:value-type="string" calcext:value-type="string">
            <text:p>adjudicators_F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_2001</text:p>
          </table:table-cell>
          <table:table-cell table:style-name="ce5" office:value-type="string" calcext:value-type="string">
            <text:p>part_time_names_found</text:p>
          </table:table-cell>
          <table:table-cell office:value-type="string" calcext:value-type="string">
            <text:p>adjudicators_P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1_2002</text:p>
          </table:table-cell>
          <table:table-cell table:style-name="ce5" office:value-type="string" calcext:value-type="string">
            <text:p>canonical_names_found</text:p>
          </table:table-cell>
          <table:table-cell office:value-type="string" calcext:value-type="string">
            <text:p>adjudicators_F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1_2002</text:p>
          </table:table-cell>
          <table:table-cell table:style-name="ce5" office:value-type="string" calcext:value-type="string">
            <text:p>part_time_names_found</text:p>
          </table:table-cell>
          <table:table-cell office:value-type="string" calcext:value-type="string">
            <text:p>adjudicators_P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2_2003</text:p>
          </table:table-cell>
          <table:table-cell table:style-name="ce5" office:value-type="string" calcext:value-type="string">
            <text:p>canonical_names_found</text:p>
          </table:table-cell>
          <table:table-cell office:value-type="string" calcext:value-type="string">
            <text:p>adjudicators_F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2_2003</text:p>
          </table:table-cell>
          <table:table-cell table:style-name="ce5" office:value-type="string" calcext:value-type="string">
            <text:p>part_time_names_found</text:p>
          </table:table-cell>
          <table:table-cell office:value-type="string" calcext:value-type="string">
            <text:p>adjudicators_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3_2004</text:p>
          </table:table-cell>
          <table:table-cell table:style-name="ce5" office:value-type="string" calcext:value-type="string">
            <text:p>canonical_names_found</text:p>
          </table:table-cell>
          <table:table-cell office:value-type="string" calcext:value-type="string">
            <text:p>adjudicators_F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3_2004</text:p>
          </table:table-cell>
          <table:table-cell table:style-name="ce5" office:value-type="string" calcext:value-type="string">
            <text:p>part_time_names_found</text:p>
          </table:table-cell>
          <table:table-cell office:value-type="string" calcext:value-type="string">
            <text:p>adjudicators_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4_2005</text:p>
          </table:table-cell>
          <table:table-cell table:style-name="ce5" office:value-type="string" calcext:value-type="string">
            <text:p>canonical_names_found</text:p>
          </table:table-cell>
          <table:table-cell office:value-type="string" calcext:value-type="string">
            <text:p>adjudicators_F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4_2005</text:p>
          </table:table-cell>
          <table:table-cell table:style-name="ce5" office:value-type="string" calcext:value-type="string">
            <text:p>part_time_names_found</text:p>
          </table:table-cell>
          <table:table-cell office:value-type="string" calcext:value-type="string">
            <text:p>adjudicators_P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5_2006</text:p>
          </table:table-cell>
          <table:table-cell table:style-name="ce5" office:value-type="string" calcext:value-type="string">
            <text:p>canonical_names_found</text:p>
          </table:table-cell>
          <table:table-cell office:value-type="string" calcext:value-type="string">
            <text:p>adjudicators_F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5_2006</text:p>
          </table:table-cell>
          <table:table-cell table:style-name="ce5" office:value-type="string" calcext:value-type="string">
            <text:p>part_time_names_found</text:p>
          </table:table-cell>
          <table:table-cell office:value-type="string" calcext:value-type="string">
            <text:p>adjudicators_P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6_2007</text:p>
          </table:table-cell>
          <table:table-cell table:style-name="ce5" office:value-type="string" calcext:value-type="string">
            <text:p>canonical_names_found</text:p>
          </table:table-cell>
          <table:table-cell office:value-type="string" calcext:value-type="string">
            <text:p>adjudicators_F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6_2007</text:p>
          </table:table-cell>
          <table:table-cell table:style-name="ce5" office:value-type="string" calcext:value-type="string">
            <text:p>part_time_names_found</text:p>
          </table:table-cell>
          <table:table-cell office:value-type="string" calcext:value-type="string">
            <text:p>adjudicators_P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7_2008</text:p>
          </table:table-cell>
          <table:table-cell table:style-name="ce5" office:value-type="string" calcext:value-type="string">
            <text:p>canonical_names_found</text:p>
          </table:table-cell>
          <table:table-cell office:value-type="string" calcext:value-type="string">
            <text:p>adjudicators_F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7_2008</text:p>
          </table:table-cell>
          <table:table-cell table:style-name="ce5" office:value-type="string" calcext:value-type="string">
            <text:p>part_time_names_found</text:p>
          </table:table-cell>
          <table:table-cell office:value-type="string" calcext:value-type="string">
            <text:p>adjudicators_P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_2009</text:p>
          </table:table-cell>
          <table:table-cell table:style-name="ce5" office:value-type="string" calcext:value-type="string">
            <text:p>canonical_names_found</text:p>
          </table:table-cell>
          <table:table-cell office:value-type="string" calcext:value-type="string">
            <text:p>adjudicators_F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_2009</text:p>
          </table:table-cell>
          <table:table-cell table:style-name="ce5" office:value-type="string" calcext:value-type="string">
            <text:p>part_time_names_found</text:p>
          </table:table-cell>
          <table:table-cell office:value-type="string" calcext:value-type="string">
            <text:p>adjudicators_P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9_2010</text:p>
          </table:table-cell>
          <table:table-cell table:style-name="ce5" office:value-type="string" calcext:value-type="string">
            <text:p>canonical_names_found</text:p>
          </table:table-cell>
          <table:table-cell office:value-type="string" calcext:value-type="string">
            <text:p>adjudicators_F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9_2010</text:p>
          </table:table-cell>
          <table:table-cell table:style-name="ce5" office:value-type="string" calcext:value-type="string">
            <text:p>part_time_names_found</text:p>
          </table:table-cell>
          <table:table-cell office:value-type="string" calcext:value-type="string">
            <text:p>adjudicators_P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nted via scripts, check Methodology_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_2021</text:p>
          </table:table-cell>
          <table:table-cell table:number-columns-repeated="2" office:value-type="string" calcext:value-type="string">
            <text:p>adjudicators_F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_2021</text:p>
          </table:table-cell>
          <table:table-cell table:number-columns-repeated="2" office:value-type="string" calcext:value-type="string">
            <text:p>adjudicators_P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_2022</text:p>
          </table:table-cell>
          <table:table-cell table:number-columns-repeated="2" office:value-type="string" calcext:value-type="string">
            <text:p>adjudicators_F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_2022</text:p>
          </table:table-cell>
          <table:table-cell table:number-columns-repeated="2" office:value-type="string" calcext:value-type="string">
            <text:p>adjudicators_P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_2023</text:p>
          </table:table-cell>
          <table:table-cell table:number-columns-repeated="2" office:value-type="string" calcext:value-type="string">
            <text:p>adjudicators_F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djudicators_FTE</text:p>
          </table:table-cell>
          <table:table-cell office:value-type="string" calcext:value-type="string">
            <text:p>adjudicators_F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“Additional 40 adjudicators FTE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_2023</text:p>
          </table:table-cell>
          <table:table-cell table:number-columns-repeated="2" office:value-type="string" calcext:value-type="string">
            <text:p>adjudicators_P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staff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eople?</text:p>
          </table:table-cell>
          <table:table-cell office:value-type="string" calcext:value-type="string">
            <text:p>“Additional 35 staff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staff_F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_2024</text:p>
          </table:table-cell>
          <table:table-cell table:number-columns-repeated="2" office:value-type="string" calcext:value-type="string">
            <text:p>adjudicators_F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_2024</text:p>
          </table:table-cell>
          <table:table-cell table:number-columns-repeated="2" office:value-type="string" calcext:value-type="string">
            <text:p>adjudicators_P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_2025</text:p>
          </table:table-cell>
          <table:table-cell table:number-columns-repeated="2" office:value-type="string" calcext:value-type="string">
            <text:p>adjudicators_F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_2025</text:p>
          </table:table-cell>
          <table:table-cell table:number-columns-repeated="2" office:value-type="string" calcext:value-type="string">
            <text:p>adjudicators_P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“Significant increase in (number?) of Dispute Resolution Officers”</text:p>
          </table:table-cell>
          <table:table-cell table:number-columns-repeated="4"/>
        </table:table-row>
        <table:table-row table:style-name="ro1" table:number-rows-repeated="104853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vot Table_GH_staffing_metrics_1" table:style-name="ta1">
        <office:forms form:automatic-focus="false" form:apply-design-mode="false"/>
        <table:shapes>
          <draw:frame draw:z-index="0" draw:style-name="gr1" draw:text-style-name="P1" svg:width="16.01cm" svg:height="9.009cm" svg:x="9.35cm" svg:y="0.226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2"/>
        <table:table-column table:style-name="co1" table:default-cell-style-name="ce37"/>
        <table:table-column table:style-name="co1" table:default-cell-style-name="ce41"/>
        <table:table-column table:style-name="co1" table:default-cell-style-name="ce45"/>
        <table:table-row table:style-name="ro1">
          <table:table-cell table:style-name="ce9" office:value-type="string" calcext:value-type="string">
            <text:p>Sum - value</text:p>
          </table:table-cell>
          <table:table-cell table:style-name="ce14" office:value-type="string" calcext:value-type="string">
            <text:p>employment_status</text:p>
          </table:table-cell>
          <table:table-cell table:style-name="ce20"/>
          <table:table-cell table:style-name="ce29"/>
        </table:table-row>
        <table:table-row table:style-name="ro1">
          <table:table-cell table:style-name="ce10" office:value-type="string" calcext:value-type="string">
            <text:p>report_id</text:p>
          </table:table-cell>
          <table:table-cell table:style-name="ce15" office:value-type="string" calcext:value-type="string">
            <text:p>adjudicators_FT</text:p>
          </table:table-cell>
          <table:table-cell table:style-name="ce21" office:value-type="string" calcext:value-type="string">
            <text:p>adjudicators_PT</text:p>
          </table:table-cell>
          <table:table-cell table:style-name="ce30" office:value-type="string" calcext:value-type="string">
            <text:p>Total Result</text:p>
          </table:table-cell>
        </table:table-row>
        <table:table-row table:style-name="ro1">
          <table:table-cell table:style-name="ce11" office:value-type="string" calcext:value-type="string">
            <text:p>1998_1999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99_20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00_2001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01_2002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02_200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03_200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04_2005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05_200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06_200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07_2008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08_2009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09_201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20_20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1_202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2_202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_202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4_2025</text:p>
          </table:table-cell>
          <table:table-cell table:style-name="ce38" office:value-type="float" office:value="81" calcext:value-type="float">
            <text:p>81</text:p>
          </table:table-cell>
          <table:table-cell table:style-name="ce42" office:value-type="float" office:value="52" calcext:value-type="float">
            <text:p>52</text:p>
          </table:table-cell>
          <table:table-cell table:style-name="ce46" office:value-type="float" office:value="133" calcext:value-type="float">
            <text:p>133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39" office:value-type="float" office:value="987" calcext:value-type="float">
            <text:p>987</text:p>
          </table:table-cell>
          <table:table-cell table:style-name="ce43" office:value-type="float" office:value="349" calcext:value-type="float">
            <text:p>349</text:p>
          </table:table-cell>
          <table:table-cell table:style-name="ce47" office:value-type="float" office:value="1336" calcext:value-type="float">
            <text:p>1336</text:p>
          </table:table-cell>
        </table:table-row>
      </table:table>
      <table:table table:name="GH_regional_metrics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Uploaded to GitHub May 9 or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ort_id</text:p>
          </table:table-cell>
          <table:table-cell office:value-type="string" calcext:value-type="string">
            <text:p>region_id</text:p>
          </table:table-cell>
          <table:table-cell office:value-type="string" calcext:value-type="string">
            <text:p>metric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9282" calcext:value-type="float">
            <text:p>928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10490" calcext:value-type="float">
            <text:p>1049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9289" calcext:value-type="float">
            <text:p>928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1547" calcext:value-type="float">
            <text:p>1154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8732" calcext:value-type="float">
            <text:p>873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11352" calcext:value-type="float">
            <text:p>1135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5396" calcext:value-type="float">
            <text:p>1539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7508" calcext:value-type="float">
            <text:p>750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9907" calcext:value-type="float">
            <text:p>990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1181" calcext:value-type="float">
            <text:p>1118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7580" calcext:value-type="float">
            <text:p>758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10343" calcext:value-type="float">
            <text:p>1034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2301" calcext:value-type="float">
            <text:p>1230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7685" calcext:value-type="float">
            <text:p>768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9071" calcext:value-type="float">
            <text:p>907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9598" calcext:value-type="float">
            <text:p>959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2495" calcext:value-type="float">
            <text:p>1249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8987" calcext:value-type="float">
            <text:p>898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11737" calcext:value-type="float">
            <text:p>1173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2228" calcext:value-type="float">
            <text:p>1222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7733" calcext:value-type="float">
            <text:p>773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9534" calcext:value-type="float">
            <text:p>953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10269" calcext:value-type="float">
            <text:p>1026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2618" calcext:value-type="float">
            <text:p>1261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9433" calcext:value-type="float">
            <text:p>943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11881" calcext:value-type="float">
            <text:p>1188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3085" calcext:value-type="float">
            <text:p>1308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7507" calcext:value-type="float">
            <text:p>750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9660" calcext:value-type="float">
            <text:p>966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1391" calcext:value-type="float">
            <text:p>1139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8164" calcext:value-type="float">
            <text:p>816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10448" calcext:value-type="float">
            <text:p>1044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1435" calcext:value-type="float">
            <text:p>1143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7519" calcext:value-type="float">
            <text:p>751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7781" calcext:value-type="float">
            <text:p>778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9340" calcext:value-type="float">
            <text:p>934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1511" calcext:value-type="float">
            <text:p>1151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9137" calcext:value-type="float">
            <text:p>913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10489" calcext:value-type="float">
            <text:p>1048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1686" calcext:value-type="float">
            <text:p>1168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8599" calcext:value-type="float">
            <text:p>859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9819" calcext:value-type="float">
            <text:p>981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2472" calcext:value-type="float">
            <text:p>1247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9632" calcext:value-type="float">
            <text:p>963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11191" calcext:value-type="float">
            <text:p>1119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2121" calcext:value-type="float">
            <text:p>1212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9601" calcext:value-type="float">
            <text:p>960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8304" calcext:value-type="float">
            <text:p>830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11256" calcext:value-type="float">
            <text:p>1125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2856" calcext:value-type="float">
            <text:p>1285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11350" calcext:value-type="float">
            <text:p>1135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11856" calcext:value-type="float">
            <text:p>1185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2691" calcext:value-type="float">
            <text:p>1269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7892" calcext:value-type="float">
            <text:p>789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6987" calcext:value-type="float">
            <text:p>698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9369" calcext:value-type="float">
            <text:p>936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0961" calcext:value-type="float">
            <text:p>1096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9841" calcext:value-type="float">
            <text:p>984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9745" calcext:value-type="float">
            <text:p>974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0517" calcext:value-type="float">
            <text:p>1051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9358" calcext:value-type="float">
            <text:p>935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8113" calcext:value-type="float">
            <text:p>811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10689" calcext:value-type="float">
            <text:p>1068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2758" calcext:value-type="float">
            <text:p>1275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11656" calcext:value-type="float">
            <text:p>1165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11947" calcext:value-type="float">
            <text:p>1194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2397" calcext:value-type="float">
            <text:p>1239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9651" calcext:value-type="float">
            <text:p>965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8714" calcext:value-type="float">
            <text:p>871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11467" calcext:value-type="float">
            <text:p>1146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3496" calcext:value-type="float">
            <text:p>1349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12264" calcext:value-type="float">
            <text:p>1226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13455" calcext:value-type="float">
            <text:p>1345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2778" calcext:value-type="float">
            <text:p>1277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9166" calcext:value-type="float">
            <text:p>916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9283" calcext:value-type="float">
            <text:p>928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10031" calcext:value-type="float">
            <text:p>1003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2166" calcext:value-type="float">
            <text:p>1216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9808" calcext:value-type="float">
            <text:p>980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12816" calcext:value-type="float">
            <text:p>1281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1360" calcext:value-type="float">
            <text:p>1136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8970" calcext:value-type="float">
            <text:p>897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9982" calcext:value-type="float">
            <text:p>998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2595" calcext:value-type="float">
            <text:p>1259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9908" calcext:value-type="float">
            <text:p>990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12325" calcext:value-type="float">
            <text:p>1232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0956" calcext:value-type="float">
            <text:p>1095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9416" calcext:value-type="float">
            <text:p>941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8154" calcext:value-type="float">
            <text:p>815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10862" calcext:value-type="float">
            <text:p>1086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10977" calcext:value-type="float">
            <text:p>1097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13470" calcext:value-type="float">
            <text:p>1347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1717" calcext:value-type="float">
            <text:p>1171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ceived</text:p>
          </table:table-cell>
          <table:table-cell office:value-type="float" office:value="8820" calcext:value-type="float">
            <text:p>882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ceived</text:p>
          </table:table-cell>
          <table:table-cell office:value-type="float" office:value="8329" calcext:value-type="float">
            <text:p>832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ceived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ceived</text:p>
          </table:table-cell>
          <table:table-cell office:value-type="float" office:value="11392" calcext:value-type="float">
            <text:p>1139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ceived</text:p>
          </table:table-cell>
          <table:table-cell office:value-type="float" office:value="13488" calcext:value-type="float">
            <text:p>1348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ceived</text:p>
          </table:table-cell>
          <table:table-cell office:value-type="float" office:value="11191" calcext:value-type="float">
            <text:p>1119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ceived</text:p>
          </table:table-cell>
          <table:table-cell office:value-type="float" office:value="13112" calcext:value-type="float">
            <text:p>1311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ceived</text:p>
          </table:table-cell>
          <table:table-cell office:value-type="float" office:value="11703" calcext:value-type="float">
            <text:p>1170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8393" calcext:value-type="float">
            <text:p>839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9551" calcext:value-type="float">
            <text:p>955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8537" calcext:value-type="float">
            <text:p>853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0665" calcext:value-type="float">
            <text:p>1066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8120" calcext:value-type="float">
            <text:p>812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0617" calcext:value-type="float">
            <text:p>1061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7449" calcext:value-type="float">
            <text:p>744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9664" calcext:value-type="float">
            <text:p>966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9120" calcext:value-type="float">
            <text:p>912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1118" calcext:value-type="float">
            <text:p>1111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7992" calcext:value-type="float">
            <text:p>799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2791" calcext:value-type="float">
            <text:p>1279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8456" calcext:value-type="float">
            <text:p>845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9360" calcext:value-type="float">
            <text:p>936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9644" calcext:value-type="float">
            <text:p>964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2347" calcext:value-type="float">
            <text:p>1234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9497" calcext:value-type="float">
            <text:p>949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2309" calcext:value-type="float">
            <text:p>1230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3176" calcext:value-type="float">
            <text:p>1317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9503" calcext:value-type="float">
            <text:p>950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2452" calcext:value-type="float">
            <text:p>1245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9917" calcext:value-type="float">
            <text:p>991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1898" calcext:value-type="float">
            <text:p>1189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3708" calcext:value-type="float">
            <text:p>1370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7323" calcext:value-type="float">
            <text:p>732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9689" calcext:value-type="float">
            <text:p>968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1116" calcext:value-type="float">
            <text:p>1111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7843" calcext:value-type="float">
            <text:p>784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0437" calcext:value-type="float">
            <text:p>1043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1447" calcext:value-type="float">
            <text:p>1144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7511" calcext:value-type="float">
            <text:p>751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9626" calcext:value-type="float">
            <text:p>962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1736" calcext:value-type="float">
            <text:p>1173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9107" calcext:value-type="float">
            <text:p>910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0834" calcext:value-type="float">
            <text:p>1083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7860" calcext:value-type="float">
            <text:p>786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8289" calcext:value-type="float">
            <text:p>828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9350" calcext:value-type="float">
            <text:p>935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1582" calcext:value-type="float">
            <text:p>1158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8928" calcext:value-type="float">
            <text:p>892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0489" calcext:value-type="float">
            <text:p>1048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1323" calcext:value-type="float">
            <text:p>1132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10509" calcext:value-type="float">
            <text:p>1050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9792" calcext:value-type="float">
            <text:p>979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11576" calcext:value-type="float">
            <text:p>1157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3642" calcext:value-type="float">
            <text:p>1364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12637" calcext:value-type="float">
            <text:p>1263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2807" calcext:value-type="float">
            <text:p>1280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3776" calcext:value-type="float">
            <text:p>1377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8397" calcext:value-type="float">
            <text:p>839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10406" calcext:value-type="float">
            <text:p>1040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2447" calcext:value-type="float">
            <text:p>1244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11815" calcext:value-type="float">
            <text:p>1181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1060" calcext:value-type="float">
            <text:p>1106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1988" calcext:value-type="float">
            <text:p>1198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9978" calcext:value-type="float">
            <text:p>997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8755" calcext:value-type="float">
            <text:p>875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10943" calcext:value-type="float">
            <text:p>1094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3254" calcext:value-type="float">
            <text:p>1325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12497" calcext:value-type="float">
            <text:p>1249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1701" calcext:value-type="float">
            <text:p>1170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2515" calcext:value-type="float">
            <text:p>1251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10279" calcext:value-type="float">
            <text:p>1027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9512" calcext:value-type="float">
            <text:p>951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11819" calcext:value-type="float">
            <text:p>1181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3887" calcext:value-type="float">
            <text:p>1388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12926" calcext:value-type="float">
            <text:p>1292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3142" calcext:value-type="float">
            <text:p>1314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2692" calcext:value-type="float">
            <text:p>1269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9847" calcext:value-type="float">
            <text:p>984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9315" calcext:value-type="float">
            <text:p>931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10797" calcext:value-type="float">
            <text:p>1079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2813" calcext:value-type="float">
            <text:p>1281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10874" calcext:value-type="float">
            <text:p>1087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3207" calcext:value-type="float">
            <text:p>1320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2002" calcext:value-type="float">
            <text:p>1200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8992" calcext:value-type="float">
            <text:p>899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8991" calcext:value-type="float">
            <text:p>899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9899" calcext:value-type="float">
            <text:p>989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2486" calcext:value-type="float">
            <text:p>1248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9554" calcext:value-type="float">
            <text:p>955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1681" calcext:value-type="float">
            <text:p>1168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9369" calcext:value-type="float">
            <text:p>936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10694" calcext:value-type="float">
            <text:p>1069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11142" calcext:value-type="float">
            <text:p>1114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3449" calcext:value-type="float">
            <text:p>1344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2164" calcext:value-type="float">
            <text:p>1216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resolved</text:p>
          </table:table-cell>
          <table:table-cell office:value-type="float" office:value="8904" calcext:value-type="float">
            <text:p>890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resolved</text:p>
          </table:table-cell>
          <table:table-cell office:value-type="float" office:value="8267" calcext:value-type="float">
            <text:p>826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resolved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resolved</text:p>
          </table:table-cell>
          <table:table-cell office:value-type="float" office:value="11346" calcext:value-type="float">
            <text:p>1134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resolved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resolved</text:p>
          </table:table-cell>
          <table:table-cell office:value-type="float" office:value="11509" calcext:value-type="float">
            <text:p>1150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resolved</text:p>
          </table:table-cell>
          <table:table-cell office:value-type="float" office:value="13225" calcext:value-type="float">
            <text:p>1322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resolved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8_1999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data missing</text:p>
          </table:table-cell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central</text:p>
          </table:table-cell>
          <table:table-cell office:value-type="string" calcext:value-type="string">
            <text:p>total_unresolved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eastern</text:p>
          </table:table-cell>
          <table:table-cell office:value-type="string" calcext:value-type="string">
            <text:p>total_unresolved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northern</text:p>
          </table:table-cell>
          <table:table-cell office:value-type="string" calcext:value-type="string">
            <text:p>total_unresolved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southern</text:p>
          </table:table-cell>
          <table:table-cell office:value-type="string" calcext:value-type="string">
            <text:p>total_unresolved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southwestern</text:p>
          </table:table-cell>
          <table:table-cell office:value-type="string" calcext:value-type="string">
            <text:p>total_unresolved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torontoNorth</text:p>
          </table:table-cell>
          <table:table-cell office:value-type="string" calcext:value-type="string">
            <text:p>total_unresolved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torontoEast</text:p>
          </table:table-cell>
          <table:table-cell office:value-type="string" calcext:value-type="string">
            <text:p>total_unresolved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gion_torontoSouth</text:p>
          </table:table-cell>
          <table:table-cell office:value-type="string" calcext:value-type="string">
            <text:p>total_unresolved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applications</text:p>
          </table:table-cell>
          <table:table-cell/>
        </table:table-row>
      </table:table>
      <table:table table:name="GH_app_type_dictionary" table:style-name="ta1">
        <office:forms form:automatic-focus="false" form:apply-design-mode="false"/>
        <table:table-column table:style-name="co6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pp_code</text:p>
          </table:table-cell>
          <table:table-cell office:value-type="string" calcext:value-type="string">
            <text:p>first_year</text:p>
          </table:table-cell>
          <table:table-cell office:value-type="string" calcext:value-type="string">
            <text:p>last_year</text:p>
          </table:table-cell>
          <table:table-cell office:value-type="string" calcext:value-type="string">
            <text:p>applicant_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table:style-name="ce88" office:value-type="string" calcext:value-type="string">
            <text:p>Uploaded to GH May 14 2026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998" calcext:value-type="float">
            <text:p>199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mbined_L_T</text:p>
          </table:table-cell>
          <table:table-cell office:value-type="string" calcext:value-type="string">
            <text:p>Determine Whether Act Appl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L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Determine Whether Act Appl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T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tenant</text:p>
          </table:table-cell>
          <table:table-cell office:value-type="string" calcext:value-type="string">
            <text:p>Determine Whether Act Appl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998" calcext:value-type="float">
            <text:p>199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mbined_L_T</text:p>
          </table:table-cell>
          <table:table-cell office:value-type="string" calcext:value-type="string">
            <text:p>Sublet or Assign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L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Sublet or Assign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T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tenant</text:p>
          </table:table-cell>
          <table:table-cell office:value-type="string" calcext:value-type="string">
            <text:p>Sublet or Assign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998" calcext:value-type="float">
            <text:p>199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mbined_L_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Assuming this means application includes multiple issues</text:p>
          </table:table-cell>
          <table:table-cell/>
        </table:table-row>
        <table:table-row table:style-name="ro1">
          <table:table-cell office:value-type="string" calcext:value-type="string">
            <text:p>A3L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Usually includes a L1</text:p>
          </table:table-cell>
          <table:table-cell/>
        </table:table-row>
        <table:table-row table:style-name="ro1">
          <table:table-cell office:value-type="string" calcext:value-type="string">
            <text:p>A3T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tenant</text:p>
          </table:table-cell>
          <table:table-cell office:value-type="string" calcext:value-type="string">
            <text:p>Combined Appl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998" calcext:value-type="float">
            <text:p>199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mbined_L_T</text:p>
          </table:table-cell>
          <table:table-cell office:value-type="string" calcext:value-type="string">
            <text:p>Vary Rent Reduction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L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Vary Rent Reduction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T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tenant</text:p>
          </table:table-cell>
          <table:table-cell office:value-type="string" calcext:value-type="string">
            <text:p>Vary Rent Reduction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Termination for Non-Payment of 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Terminate Tenancy &amp; Ev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Termination Tenant Gave Not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Terminate Tenancy: Failed Sett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Rent Increase above Guide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Review of Provincial Work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Transfer Tenant to Care Hom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8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Tenant Changed Lo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Application to Collect 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Collect Money Former Tenant O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tenant</text:p>
          </table:table-cell>
          <table:table-cell office:value-type="string" calcext:value-type="string">
            <text:p>Rent Rebate (eg. Illegal 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tenant</text:p>
          </table:table-cell>
          <table:table-cell office:value-type="string" calcext:value-type="string">
            <text:p>Tenant Righ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tenant</text:p>
          </table:table-cell>
          <table:table-cell office:value-type="string" calcext:value-type="string">
            <text:p>Rent Re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enant</text:p>
          </table:table-cell>
          <table:table-cell office:value-type="string" calcext:value-type="string">
            <text:p>Failed Rent Increase above Guide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tenant</text:p>
          </table:table-cell>
          <table:table-cell office:value-type="string" calcext:value-type="string">
            <text:p>Bad faith Notice of Termination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T6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enant</text:p>
          </table:table-cell>
          <table:table-cell table:style-name="ce48" office:value-type="string" calcext:value-type="string">
            <text:p>Maintenance 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T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tenant</text:p>
          </table:table-cell>
          <table:table-cell table:style-name="ce48" office:value-type="string" calcext:value-type="string">
            <text:p>Suite Meters</text:p>
          </table:table-cell>
          <table:table-cell table:number-columns-repeated="2"/>
        </table:table-row>
      </table:table>
      <table:table table:name="GH_app_type_metric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port_id</text:p>
          </table:table-cell>
          <table:table-cell office:value-type="string" calcext:value-type="string">
            <text:p>app_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etric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_status</text:p>
          </table:table-cell>
          <table:table-cell table:style-name="ce88" office:value-type="string" calcext:value-type="string">
            <text:p>Uploaded to GH May 14 2026</text:p>
          </table:table-cell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47121" calcext:value-type="float">
            <text:p>4712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float" office:value="29903" calcext:value-type="float">
            <text:p>2990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float" office:value="14398" calcext:value-type="float">
            <text:p>1439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6347" calcext:value-type="float">
            <text:p>634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1999_2000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48646" calcext:value-type="float">
            <text:p>4864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float" office:value="31117" calcext:value-type="float">
            <text:p>3111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float" office:value="15553" calcext:value-type="float">
            <text:p>1555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7052" calcext:value-type="float">
            <text:p>705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49590" calcext:value-type="float">
            <text:p>4959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float" office:value="29358" calcext:value-type="float">
            <text:p>2935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float" office:value="16807" calcext:value-type="float">
            <text:p>1680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8006" calcext:value-type="float">
            <text:p>800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48816" calcext:value-type="float">
            <text:p>488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float" office:value="26766" calcext:value-type="float">
            <text:p>2676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float" office:value="19181" calcext:value-type="float">
            <text:p>1918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2_200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51207" calcext:value-type="float">
            <text:p>5120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float" office:value="31422" calcext:value-type="float">
            <text:p>3142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float" office:value="18583" calcext:value-type="float">
            <text:p>1858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3_2004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55877" calcext:value-type="float">
            <text:p>5587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float" office:value="31590" calcext:value-type="float">
            <text:p>3159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float" office:value="18024" calcext:value-type="float">
            <text:p>1802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5671" calcext:value-type="float">
            <text:p>567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4_200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60446" calcext:value-type="float">
            <text:p>6044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float" office:value="29697" calcext:value-type="float">
            <text:p>2969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float" office:value="22170" calcext:value-type="float">
            <text:p>2217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5969" calcext:value-type="float">
            <text:p>596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5_200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50683" calcext:value-type="float">
            <text:p>5068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float" office:value="24779" calcext:value-type="float">
            <text:p>2477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float" office:value="21661" calcext:value-type="float">
            <text:p>2166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5089" calcext:value-type="float">
            <text:p>508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6_2007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55719" calcext:value-type="float">
            <text:p>5571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7_2008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4255" calcext:value-type="float">
            <text:p>425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59053" calcext:value-type="float">
            <text:p>5905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8_2009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54109" calcext:value-type="float">
            <text:p>5410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5628" calcext:value-type="float">
            <text:p>562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9_2010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53182" calcext:value-type="float">
            <text:p>5318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4805" calcext:value-type="float">
            <text:p>480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0_201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54847" calcext:value-type="float">
            <text:p>5484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6867" calcext:value-type="float">
            <text:p>686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1_201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54777" calcext:value-type="float">
            <text:p>5477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5549" calcext:value-type="float">
            <text:p>554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676" calcext:value-type="float">
            <text:p>367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2_201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52832" calcext:value-type="float">
            <text:p>5283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7312" calcext:value-type="float">
            <text:p>731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49991" calcext:value-type="float">
            <text:p>4999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48940" calcext:value-type="float">
            <text:p>4894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8876" calcext:value-type="float">
            <text:p>887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5559" calcext:value-type="float">
            <text:p>555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49489" calcext:value-type="float">
            <text:p>4948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9987" calcext:value-type="float">
            <text:p>998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47595" calcext:value-type="float">
            <text:p>4759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11404" calcext:value-type="float">
            <text:p>1140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5552" calcext:value-type="float">
            <text:p>555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46043" calcext:value-type="float">
            <text:p>4604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13945" calcext:value-type="float">
            <text:p>1394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8_2019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44621" calcext:value-type="float">
            <text:p>4462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15732" calcext:value-type="float">
            <text:p>1573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19_2020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24481" calcext:value-type="float">
            <text:p>2448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11031" calcext:value-type="float">
            <text:p>1103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0_202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31240" calcext:value-type="float">
            <text:p>3124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13937" calcext:value-type="float">
            <text:p>1393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Collect Money Former Tenant Owes (2021)</text:p>
          </table:table-cell>
          <table:table-cell office:value-type="string" calcext:value-type="string">
            <text:p>ca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Collect Money Former Tenant Owes (202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Collect Money Former Tenant Owes (202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1_202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37690" calcext:value-type="float">
            <text:p>3769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15354" calcext:value-type="float">
            <text:p>1535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Collect Money Former Tenant Owes (2021)</text:p>
          </table:table-cell>
          <table:table-cell office:value-type="string" calcext:value-type="string">
            <text:p>case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Collect Money Former Tenant Owes (202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Collect Money Former Tenant Owes (202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2_202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41386" calcext:value-type="float">
            <text:p>4138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16677" calcext:value-type="float">
            <text:p>1667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5535" calcext:value-type="float">
            <text:p>553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Collect Money Former Tenant Owes (2021)</text:p>
          </table:table-cell>
          <table:table-cell office:value-type="string" calcext:value-type="string">
            <text:p>cases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Collect Money Former Tenant Owes (202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Collect Money Former Tenant Owes (202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3_202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cas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1T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cas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2T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cases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3L</text:p>
          </table:table-cell>
          <table:table-cell office:value-type="string" calcext:value-type="string">
            <text:p>Combined Application (usually includes L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cases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3T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4L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A4T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cases</text:p>
          </table:table-cell>
          <table:table-cell office:value-type="float" office:value="45435" calcext:value-type="float">
            <text:p>4543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cases</text:p>
          </table:table-cell>
          <table:table-cell office:value-type="float" office:value="15838" calcext:value-type="float">
            <text:p>1583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cases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cases</text:p>
          </table:table-cell>
          <table:table-cell office:value-type="float" office:value="6613" calcext:value-type="float">
            <text:p>661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ca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ca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cas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cas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Application to Collect Rent (2007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Collect Money Former Tenant Owes (2021)</text:p>
          </table:table-cell>
          <table:table-cell office:value-type="string" calcext:value-type="string">
            <text:p>cases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Collect Money Former Tenant Owes (2021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Collect Money Former Tenant Owes (2021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cases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cases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case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cas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iled Rent Increase Above Guidelines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case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ases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cas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24_2025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uite Meters (2010)</text:p>
          </table:table-cell>
          <table:table-cell office:value-type="string" calcext:value-type="string">
            <text:p>hearin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_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time_per_hear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time_per_hea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time_per_heari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time_per_hea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time_per_hea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time_per_hea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time_per_hea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time_per_heari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time_per_hearin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time_per_hear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time_per_hear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time_per_heari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time_per_hea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time_per_hear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time_per_hear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time_per_hea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0_200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time_per_hea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termine Whether Act Applies</text:p>
          </table:table-cell>
          <table:table-cell office:value-type="string" calcext:value-type="string">
            <text:p>time_per_hear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ublet or Assignment</text:p>
          </table:table-cell>
          <table:table-cell office:value-type="string" calcext:value-type="string">
            <text:p>time_per_hea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mbined Application</text:p>
          </table:table-cell>
          <table:table-cell office:value-type="string" calcext:value-type="string">
            <text:p>time_per_heari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ary Rent Reduction Amount</text:p>
          </table:table-cell>
          <table:table-cell office:value-type="string" calcext:value-type="string">
            <text:p>time_per_hea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ermination for Non-Payment of Rent</text:p>
          </table:table-cell>
          <table:table-cell office:value-type="string" calcext:value-type="string">
            <text:p>time_per_hea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erminate Tenancy &amp; Evict</text:p>
          </table:table-cell>
          <table:table-cell office:value-type="string" calcext:value-type="string">
            <text:p>time_per_hea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ermination: Tenant Gave Notice</text:p>
          </table:table-cell>
          <table:table-cell office:value-type="string" calcext:value-type="string">
            <text:p>time_per_hea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rminate Tenancy: Failed Settlement</text:p>
          </table:table-cell>
          <table:table-cell office:value-type="string" calcext:value-type="string">
            <text:p>time_per_heari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ent Increase Above Guidelines</text:p>
          </table:table-cell>
          <table:table-cell office:value-type="string" calcext:value-type="string">
            <text:p>time_per_hearin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eview of Provincial Work Order</text:p>
          </table:table-cell>
          <table:table-cell office:value-type="string" calcext:value-type="string">
            <text:p>time_per_hear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ransfer Tenant to Care Home</text:p>
          </table:table-cell>
          <table:table-cell office:value-type="string" calcext:value-type="string">
            <text:p>time_per_hear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nant Changed Locks</text:p>
          </table:table-cell>
          <table:table-cell office:value-type="string" calcext:value-type="string">
            <text:p>time_per_heari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nt Rebate (eg. Illegal rent)</text:p>
          </table:table-cell>
          <table:table-cell office:value-type="string" calcext:value-type="string">
            <text:p>time_per_hea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nant Rights</text:p>
          </table:table-cell>
          <table:table-cell office:value-type="string" calcext:value-type="string">
            <text:p>time_per_hear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nt Reduction</text:p>
          </table:table-cell>
          <table:table-cell office:value-type="string" calcext:value-type="string">
            <text:p>time_per_hear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d Faith Notice of Termination</text:p>
          </table:table-cell>
          <table:table-cell office:value-type="string" calcext:value-type="string">
            <text:p>time_per_hea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ported</text:p>
          </table:table-cell>
          <table:table-cell/>
        </table:table-row>
        <table:table-row table:style-name="ro1">
          <table:table-cell office:value-type="string" calcext:value-type="string">
            <text:p>2001_200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time_per_hea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ported</text:p>
          </table:table-cell>
          <table:table-cell/>
        </table:table-row>
      </table:table>
      <table:table table:name="GH_resolution_metrics" table:style-name="ta1">
        <office:forms form:automatic-focus="false" form:apply-design-mode="false"/>
        <table:table-column table:style-name="co14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port_id</text:p>
          </table:table-cell>
          <table:table-cell office:value-type="string" calcext:value-type="string">
            <text:p>metric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otes</text:p>
          </table:table-cell>
          <table:table-cell table:style-name="ce88" office:value-type="string" calcext:value-type="string">
            <text:p>Uploaded to GH May 14 2026</text:p>
          </table:table-cell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abandoned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s_mediation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s_hearing</text:p>
          </table:table-cell>
          <table:table-cell office:value-type="float" office:value="51845" calcext:value-type="float">
            <text:p>51845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s_wo_hearing</text:p>
          </table:table-cell>
          <table:table-cell office:value-type="float" office:value="4851" calcext:value-type="float">
            <text:p>4851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review_denied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withdrawn</text:p>
          </table:table-cell>
          <table:table-cell office:value-type="float" office:value="7223" calcext:value-type="float">
            <text:p>7223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_2014</text:p>
          </table:table-cell>
          <table:table-cell office:value-type="string" calcext:value-type="string">
            <text:p>other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abandoned</text:p>
          </table:table-cell>
          <table:table-cell office:value-type="float" office:value="12668" calcext:value-type="float">
            <text:p>12668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res_mediation</text:p>
          </table:table-cell>
          <table:table-cell office:value-type="float" office:value="11926" calcext:value-type="float">
            <text:p>11926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res_hearing</text:p>
          </table:table-cell>
          <table:table-cell office:value-type="float" office:value="48107" calcext:value-type="float">
            <text:p>48107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res_wo_hearing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review_denied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withdrawn</text:p>
          </table:table-cell>
          <table:table-cell office:value-type="float" office:value="7369" calcext:value-type="float">
            <text:p>7369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_2015</text:p>
          </table:table-cell>
          <table:table-cell office:value-type="string" calcext:value-type="string">
            <text:p>other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abandoned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res_mediation</text:p>
          </table:table-cell>
          <table:table-cell office:value-type="float" office:value="11541" calcext:value-type="float">
            <text:p>11541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res_hearing</text:p>
          </table:table-cell>
          <table:table-cell office:value-type="float" office:value="48533" calcext:value-type="float">
            <text:p>48533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res_wo_hearing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review_denied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withdrawn</text:p>
          </table:table-cell>
          <table:table-cell office:value-type="float" office:value="7487" calcext:value-type="float">
            <text:p>7487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_2016</text:p>
          </table:table-cell>
          <table:table-cell office:value-type="string" calcext:value-type="string">
            <text:p>other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abandoned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res_mediation</text:p>
          </table:table-cell>
          <table:table-cell office:value-type="float" office:value="10735" calcext:value-type="float">
            <text:p>10735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res_hearing</text:p>
          </table:table-cell>
          <table:table-cell office:value-type="float" office:value="49901" calcext:value-type="float">
            <text:p>49901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res_wo_hearing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review_denied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withdrawn</text:p>
          </table:table-cell>
          <table:table-cell office:value-type="float" office:value="8264" calcext:value-type="float">
            <text:p>8264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_2017</text:p>
          </table:table-cell>
          <table:table-cell office:value-type="string" calcext:value-type="string">
            <text:p>other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abandoned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res_mediation</text:p>
          </table:table-cell>
          <table:table-cell office:value-type="float" office:value="10804" calcext:value-type="float">
            <text:p>10804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res_hearing</text:p>
          </table:table-cell>
          <table:table-cell office:value-type="float" office:value="49776" calcext:value-type="float">
            <text:p>49776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res_wo_hearing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review_denied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withdrawn</text:p>
          </table:table-cell>
          <table:table-cell office:value-type="float" office:value="8155" calcext:value-type="float">
            <text:p>8155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_2018</text:p>
          </table:table-cell>
          <table:table-cell office:value-type="string" calcext:value-type="string">
            <text:p>other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applications</text:p>
          </table:table-cell>
          <table:table-cell table:number-columns-repeated="2"/>
        </table:table-row>
      </table:table>
      <table:table table:name="institutional_changelog" table:style-name="ta1">
        <office:forms form:automatic-focus="false" form:apply-design-mode="false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port_id</text:p>
          </table:table-cell>
          <table:table-cell office:value-type="string" calcext:value-type="string">
            <text:p>change_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pact_area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formula="of:=[$reports.A3]" office:value-type="string" office:string-value="1998_1999" calcext:value-type="string">
            <text:p>1998_1999</text:p>
          </table:table-cell>
          <table:table-cell office:value-type="string" calcext:value-type="string">
            <text:p>start_service</text:p>
          </table:table-cell>
          <table:table-cell office:value-type="string" calcext:value-type="string">
            <text:p>Ontario Rental Housing Tribunal begins operations on the same day the Tenant Protection Act becomes law</text:p>
          </table:table-cell>
          <table:table-cell office:value-type="string" calcext:value-type="string">
            <text:p>operations</text:p>
          </table:table-cell>
          <table:table-cell/>
        </table:table-row>
        <table:table-row table:style-name="ro1">
          <table:table-cell table:formula="of:=[$reports.A4]" office:value-type="string" office:string-value="1999_2000" calcext:value-type="string">
            <text:p>1999_2000</text:p>
          </table:table-cell>
          <table:table-cell office:value-type="string" calcext:value-type="string">
            <text:p>operational_review</text:p>
          </table:table-cell>
          <table:table-cell office:value-type="string" calcext:value-type="string">
            <text:p>KPMG hired to conduct an operational review in 1999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pg. 3 paragraph 2</text:p>
          </table:table-cell>
        </table:table-row>
        <table:table-row table:style-name="ro1">
          <table:table-cell table:formula="of:=[$reports.A5]" office:value-type="string" office:string-value="2000_2001" calcext:value-type="string">
            <text:p>2000_2001</text:p>
          </table:table-cell>
          <table:table-cell office:value-type="string" calcext:value-type="string">
            <text:p>consultant_recom</text:p>
          </table:table-cell>
          <table:table-cell office:value-type="string" calcext:value-type="string">
            <text:p>Focus mediation on more difficult applications, esp highly contested ones, to try to resolve before hearing</text:p>
          </table:table-cell>
          <table:table-cell office:value-type="string" calcext:value-type="string">
            <text:p>operations, mediation</text:p>
          </table:table-cell>
          <table:table-cell office:value-type="string" calcext:value-type="string">
            <text:p>clients usually not ready to mediate until day of hearing, thus difficult to increase routine mediation (vs. Duty mediation)</text:p>
          </table:table-cell>
        </table:table-row>
        <table:table-row table:style-name="ro1">
          <table:table-cell/>
          <table:table-cell office:value-type="string" calcext:value-type="string">
            <text:p>best_practices</text:p>
          </table:table-cell>
          <table:table-cell office:value-type="string" calcext:value-type="string">
            <text:p>working groups set up for admin and adjudication best practices for the purpose of increasing efficiency and streamlining processes</text:p>
          </table:table-cell>
          <table:table-cell office:value-type="string" calcext:value-type="string">
            <text:p>operations, workf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_centre_service</text:p>
          </table:table-cell>
          <table:table-cell office:value-type="string" calcext:value-type="string">
            <text:p>Changed CSR rep hours to better cover call centre during peak periods</text:p>
          </table:table-cell>
          <table:table-cell office:value-type="string" calcext:value-type="string">
            <text:p>operations, call centre, scheduling</text:p>
          </table:table-cell>
          <table:table-cell/>
        </table:table-row>
        <table:table-row table:style-name="ro1">
          <table:table-cell table:formula="of:=[$reports.A5]" office:value-type="string" office:string-value="2000_2001" calcext:value-type="string">
            <text:p>2000_2001</text:p>
          </table:table-cell>
          <table:table-cell table:number-columns-repeated="4"/>
        </table:table-row>
        <table:table-row table:style-name="ro1">
          <table:table-cell table:formula="of:=[$reports.A6]" office:value-type="string" office:string-value="2001_2002" calcext:value-type="string">
            <text:p>2001_2002</text:p>
          </table:table-cell>
          <table:table-cell table:number-columns-repeated="4"/>
        </table:table-row>
        <table:table-row table:style-name="ro1">
          <table:table-cell table:formula="of:=[$reports.A7]" office:value-type="string" office:string-value="2002_2003" calcext:value-type="string">
            <text:p>2002_2003</text:p>
          </table:table-cell>
          <table:table-cell table:number-columns-repeated="4"/>
        </table:table-row>
        <table:table-row table:style-name="ro1">
          <table:table-cell table:formula="of:=[$reports.A8]" office:value-type="string" office:string-value="2003_2004" calcext:value-type="string">
            <text:p>2003_2004</text:p>
          </table:table-cell>
          <table:table-cell table:number-columns-repeated="4"/>
        </table:table-row>
        <table:table-row table:style-name="ro1">
          <table:table-cell table:formula="of:=[$reports.A9]" office:value-type="string" office:string-value="2004_2005" calcext:value-type="string">
            <text:p>2004_2005</text:p>
          </table:table-cell>
          <table:table-cell table:number-columns-repeated="4"/>
        </table:table-row>
        <table:table-row table:style-name="ro1">
          <table:table-cell table:formula="of:=[$reports.A10]" office:value-type="string" office:string-value="2005_2006" calcext:value-type="string">
            <text:p>2005_2006</text:p>
          </table:table-cell>
          <table:table-cell table:number-columns-repeated="4"/>
        </table:table-row>
        <table:table-row table:style-name="ro1">
          <table:table-cell table:formula="of:=[$reports.A11]" office:value-type="string" office:string-value="2006_2007" calcext:value-type="string">
            <text:p>2006_2007</text:p>
          </table:table-cell>
          <table:table-cell table:number-columns-repeated="4"/>
        </table:table-row>
        <table:table-row table:style-name="ro1">
          <table:table-cell table:formula="of:=[$reports.A12]" office:value-type="string" office:string-value="2007_2008" calcext:value-type="string">
            <text:p>2007_2008</text:p>
          </table:table-cell>
          <table:table-cell table:number-columns-repeated="4"/>
        </table:table-row>
        <table:table-row table:style-name="ro1">
          <table:table-cell table:formula="of:=[$reports.A13]" office:value-type="string" office:string-value="2008_2009" calcext:value-type="string">
            <text:p>2008_2009</text:p>
          </table:table-cell>
          <table:table-cell table:number-columns-repeated="4"/>
        </table:table-row>
        <table:table-row table:style-name="ro1">
          <table:table-cell table:formula="of:=[$reports.A14]" office:value-type="string" office:string-value="2009_2010" calcext:value-type="string">
            <text:p>2009_2010</text:p>
          </table:table-cell>
          <table:table-cell table:number-columns-repeated="4"/>
        </table:table-row>
        <table:table-row table:style-name="ro1">
          <table:table-cell table:formula="of:=[$reports.A15]" office:value-type="string" office:string-value="2010_2011" calcext:value-type="string">
            <text:p>2010_2011</text:p>
          </table:table-cell>
          <table:table-cell table:number-columns-repeated="4"/>
        </table:table-row>
        <table:table-row table:style-name="ro1">
          <table:table-cell table:formula="of:=[$reports.A16]" office:value-type="string" office:string-value="2011_2012" calcext:value-type="string">
            <text:p>2011_2012</text:p>
          </table:table-cell>
          <table:table-cell table:number-columns-repeated="4"/>
        </table:table-row>
        <table:table-row table:style-name="ro1">
          <table:table-cell table:formula="of:=[$reports.A17]" office:value-type="string" office:string-value="2012_2013" calcext:value-type="string">
            <text:p>2012_2013</text:p>
          </table:table-cell>
          <table:table-cell table:number-columns-repeated="4"/>
        </table:table-row>
        <table:table-row table:style-name="ro1">
          <table:table-cell table:formula="of:=[$reports.A18]" office:value-type="string" office:string-value="2013_2014" calcext:value-type="string">
            <text:p>2013_2014</text:p>
          </table:table-cell>
          <table:table-cell table:number-columns-repeated="4"/>
        </table:table-row>
        <table:table-row table:style-name="ro1">
          <table:table-cell table:formula="of:=[$reports.A19]" office:value-type="string" office:string-value="2014_2015" calcext:value-type="string">
            <text:p>2014_2015</text:p>
          </table:table-cell>
          <table:table-cell table:number-columns-repeated="4"/>
        </table:table-row>
        <table:table-row table:style-name="ro1">
          <table:table-cell table:formula="of:=[$reports.A20]" office:value-type="string" office:string-value="2015_2016" calcext:value-type="string">
            <text:p>2015_2016</text:p>
          </table:table-cell>
          <table:table-cell table:number-columns-repeated="4"/>
        </table:table-row>
        <table:table-row table:style-name="ro1">
          <table:table-cell table:formula="of:=[$reports.A21]" office:value-type="string" office:string-value="2016_2017" calcext:value-type="string">
            <text:p>2016_2017</text:p>
          </table:table-cell>
          <table:table-cell table:number-columns-repeated="4"/>
        </table:table-row>
        <table:table-row table:style-name="ro1">
          <table:table-cell table:formula="of:=[$reports.A22]" office:value-type="string" office:string-value="2017_2018" calcext:value-type="string">
            <text:p>2017_2018</text:p>
          </table:table-cell>
          <table:table-cell table:number-columns-repeated="4"/>
        </table:table-row>
        <table:table-row table:style-name="ro1">
          <table:table-cell table:formula="of:=[$reports.A23]" office:value-type="string" office:string-value="2018_2019" calcext:value-type="string">
            <text:p>2018_2019</text:p>
          </table:table-cell>
          <table:table-cell table:number-columns-repeated="4"/>
        </table:table-row>
        <table:table-row table:style-name="ro1">
          <table:table-cell table:formula="of:=[$reports.A24]" office:value-type="string" office:string-value="2019_2020" calcext:value-type="string">
            <text:p>2019_2020</text:p>
          </table:table-cell>
          <table:table-cell table:number-columns-repeated="4"/>
        </table:table-row>
        <table:table-row table:style-name="ro1">
          <table:table-cell table:formula="of:=[$reports.A25]" office:value-type="string" office:string-value="2020_2021" calcext:value-type="string">
            <text:p>2020_2021</text:p>
          </table:table-cell>
          <table:table-cell table:number-columns-repeated="4"/>
        </table:table-row>
        <table:table-row table:style-name="ro1">
          <table:table-cell table:formula="of:=[$reports.A26]" office:value-type="string" office:string-value="2021_2022" calcext:value-type="string">
            <text:p>2021_2022</text:p>
          </table:table-cell>
          <table:table-cell table:number-columns-repeated="4"/>
        </table:table-row>
        <table:table-row table:style-name="ro1">
          <table:table-cell table:formula="of:=[$reports.A27]" office:value-type="string" office:string-value="2022_2023" calcext:value-type="string">
            <text:p>2022_2023</text:p>
          </table:table-cell>
          <table:table-cell table:number-columns-repeated="4"/>
        </table:table-row>
        <table:table-row table:style-name="ro1">
          <table:table-cell table:formula="of:=[$reports.A28]" office:value-type="string" office:string-value="2023_2024" calcext:value-type="string">
            <text:p>2023_2024</text:p>
          </table:table-cell>
          <table:table-cell table:number-columns-repeated="4"/>
        </table:table-row>
        <table:table-row table:style-name="ro1">
          <table:table-cell table:formula="of:=[$reports.A29]" office:value-type="string" office:string-value="2024_2025" calcext:value-type="string">
            <text:p>2024_2025</text:p>
          </table:table-cell>
          <table:table-cell table:number-columns-repeated="4"/>
        </table:table-row>
        <table:table-row table:style-name="ro1">
          <table:table-cell table:formula="of:=[$reports.A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3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3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4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4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4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4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5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5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5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5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5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6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6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6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6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6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6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6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6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6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reports.A69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3" table:target-range-address="GH_operational_metrics.A1:GH_operational_metrics.D104857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6" table:target-range-address="GH_staffing_metrics.A1:GH_staffing_metrics.F1048576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operational_metrics'.A1:'Pivot Table_operational_metrics'.E30" table:buttons="'Pivot Table_operational_metrics'.A2 'Pivot Table_operational_metrics'.B1" table:show-filter-button="false" table:drill-down-on-double-click="false">
          <table:source-cell-range table:cell-range-address="GH_operational_metrics.A1:GH_operational_metrics.D82"/>
          <table:data-pilot-field table:source-field-name="metric_id" table:orientation="column" table:used-hierarchy="0" table:function="auto">
            <table:data-pilot-level table:show-empty="false" calcext:repeat-item-labels="false">
              <table:data-pilot-members>
                <table:data-pilot-member table:name="total_received" table:display="true" table:show-details="true"/>
                <table:data-pilot-member table:name="total_resolved" table:display="true" table:show-details="true"/>
                <table:data-pilot-member table:name="total_unresolv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port_id" table:orientation="row" table:used-hierarchy="0" table:function="auto">
            <table:data-pilot-level table:show-empty="false" calcext:repeat-item-labels="false">
              <table:data-pilot-members>
                <table:data-pilot-member table:name="1998_1999" table:display="true" table:show-details="true"/>
                <table:data-pilot-member table:name="1999_2000" table:display="true" table:show-details="true"/>
                <table:data-pilot-member table:name="2000_2001" table:display="true" table:show-details="true"/>
                <table:data-pilot-member table:name="2001_2002" table:display="true" table:show-details="true"/>
                <table:data-pilot-member table:name="2002_2003" table:display="true" table:show-details="true"/>
                <table:data-pilot-member table:name="2003_2004" table:display="true" table:show-details="true"/>
                <table:data-pilot-member table:name="2004_2005" table:display="true" table:show-details="true"/>
                <table:data-pilot-member table:name="2005_2006" table:display="true" table:show-details="true"/>
                <table:data-pilot-member table:name="2006_2007" table:display="true" table:show-details="true"/>
                <table:data-pilot-member table:name="2007_2008" table:display="true" table:show-details="true"/>
                <table:data-pilot-member table:name="2008_2009" table:display="true" table:show-details="true"/>
                <table:data-pilot-member table:name="2009_2010" table:display="true" table:show-details="true"/>
                <table:data-pilot-member table:name="2010_2011" table:display="true" table:show-details="true"/>
                <table:data-pilot-member table:name="2011_2012" table:display="true" table:show-details="true"/>
                <table:data-pilot-member table:name="2012_2013" table:display="true" table:show-details="true"/>
                <table:data-pilot-member table:name="2013_2014" table:display="true" table:show-details="true"/>
                <table:data-pilot-member table:name="2014_2015" table:display="true" table:show-details="true"/>
                <table:data-pilot-member table:name="2015_2016" table:display="true" table:show-details="true"/>
                <table:data-pilot-member table:name="2016_2017" table:display="true" table:show-details="true"/>
                <table:data-pilot-member table:name="2017_2018" table:display="true" table:show-details="true"/>
                <table:data-pilot-member table:name="2018_2019" table:display="true" table:show-details="true"/>
                <table:data-pilot-member table:name="2019_2020" table:display="true" table:show-details="true"/>
                <table:data-pilot-member table:name="2020_2021" table:display="true" table:show-details="true"/>
                <table:data-pilot-member table:name="2021_2022" table:display="true" table:show-details="true"/>
                <table:data-pilot-member table:name="2022_2023" table:display="true" table:show-details="true"/>
                <table:data-pilot-member table:name="2023_2024" table:display="true" table:show-details="true"/>
                <table:data-pilot-member table:name="2024_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" table:orientation="data" table:used-hierarchy="0" table:function="sum">
            <table:data-pilot-level table:show-empty="false" calcext:repeat-item-labels="false">
              <table:data-pilot-members>
                <table:data-pilot-member table:name="11946" table:display="true" table:show-details="true"/>
                <table:data-pilot-member table:name="12944" table:display="true" table:show-details="true"/>
                <table:data-pilot-member table:name="13899" table:display="true" table:show-details="true"/>
                <table:data-pilot-member table:name="14726" table:display="true" table:show-details="true"/>
                <table:data-pilot-member table:name="22803" table:display="true" table:show-details="true"/>
                <table:data-pilot-member table:name="32800" table:display="true" table:show-details="true"/>
                <table:data-pilot-member table:name="34731" table:display="true" table:show-details="true"/>
                <table:data-pilot-member table:name="35983" table:display="true" table:show-details="true"/>
                <table:data-pilot-member table:name="41465" table:display="true" table:show-details="true"/>
                <table:data-pilot-member table:name="48422" table:display="true" table:show-details="true"/>
                <table:data-pilot-member table:name="52986" table:display="true" table:show-details="true"/>
                <table:data-pilot-member table:name="53030" table:display="true" table:show-details="true"/>
                <table:data-pilot-member table:name="53057" table:display="true" table:show-details="true"/>
                <table:data-pilot-member table:name="59894" table:display="true" table:show-details="true"/>
                <table:data-pilot-member table:name="61705" table:display="true" table:show-details="true"/>
                <table:data-pilot-member table:name="61868" table:display="true" table:show-details="true"/>
                <table:data-pilot-member table:name="68118" table:display="true" table:show-details="true"/>
                <table:data-pilot-member table:name="68505" table:display="true" table:show-details="true"/>
                <table:data-pilot-member table:name="70004" table:display="true" table:show-details="true"/>
                <table:data-pilot-member table:name="70181" table:display="true" table:show-details="true"/>
                <table:data-pilot-member table:name="70527" table:display="true" table:show-details="true"/>
                <table:data-pilot-member table:name="70862" table:display="true" table:show-details="true"/>
                <table:data-pilot-member table:name="71668" table:display="true" table:show-details="true"/>
                <table:data-pilot-member table:name="72064" table:display="true" table:show-details="true"/>
                <table:data-pilot-member table:name="73406" table:display="true" table:show-details="true"/>
                <table:data-pilot-member table:name="73931" table:display="true" table:show-details="true"/>
                <table:data-pilot-member table:name="74867" table:display="true" table:show-details="true"/>
                <table:data-pilot-member table:name="76946" table:display="true" table:show-details="true"/>
                <table:data-pilot-member table:name="77104" table:display="true" table:show-details="true"/>
                <table:data-pilot-member table:name="77306" table:display="true" table:show-details="true"/>
                <table:data-pilot-member table:name="77393" table:display="true" table:show-details="true"/>
                <table:data-pilot-member table:name="78072" table:display="true" table:show-details="true"/>
                <table:data-pilot-member table:name="78175" table:display="true" table:show-details="true"/>
                <table:data-pilot-member table:name="78285" table:display="true" table:show-details="true"/>
                <table:data-pilot-member table:name="78744" table:display="true" table:show-details="true"/>
                <table:data-pilot-member table:name="78783" table:display="true" table:show-details="true"/>
                <table:data-pilot-member table:name="79476" table:display="true" table:show-details="true"/>
                <table:data-pilot-member table:name="79701" table:display="true" table:show-details="true"/>
                <table:data-pilot-member table:name="79740" table:display="true" table:show-details="true"/>
                <table:data-pilot-member table:name="80214" table:display="true" table:show-details="true"/>
                <table:data-pilot-member table:name="80552" table:display="true" table:show-details="true"/>
                <table:data-pilot-member table:name="80791" table:display="true" table:show-details="true"/>
                <table:data-pilot-member table:name="80874" table:display="true" table:show-details="true"/>
                <table:data-pilot-member table:name="81000" table:display="true" table:show-details="true"/>
                <table:data-pilot-member table:name="81084" table:display="true" table:show-details="true"/>
                <table:data-pilot-member table:name="81432" table:display="true" table:show-details="true"/>
                <table:data-pilot-member table:name="81748" table:display="true" table:show-details="true"/>
                <table:data-pilot-member table:name="82095" table:display="true" table:show-details="true"/>
                <table:data-pilot-member table:name="82192" table:display="true" table:show-details="true"/>
                <table:data-pilot-member table:name="82285" table:display="true" table:show-details="true"/>
                <table:data-pilot-member table:name="85840" table:display="true" table:show-details="true"/>
                <table:data-pilot-member table:name="87977" table:display="true" table:show-details="true"/>
                <table:data-pilot-member table:name="87993" table:display="true" table:show-details="true"/>
                <table:data-pilot-member table:name="88307" table:display="true" table:show-details="true"/>
                <table:data-pilot-member table:name="10814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GH_staffing_metrics_1'.A1:'Pivot Table_GH_staffing_metrics_1'.D20" table:buttons="'Pivot Table_GH_staffing_metrics_1'.A2 'Pivot Table_GH_staffing_metrics_1'.B1" table:ignore-empty-rows="true" table:show-filter-button="false" table:drill-down-on-double-click="false" loext:show-drill-down-buttons="true">
          <table:source-cell-range table:cell-range-address="GH_staffing_metrics.A1:GH_staffing_metrics.D39"/>
          <table:data-pilot-field table:source-field-name="employment_status" table:orientation="column" table:used-hierarchy="0" table:function="auto">
            <table:data-pilot-level table:show-empty="false" calcext:repeat-item-labels="false">
              <table:data-pilot-members>
                <table:data-pilot-member table:name="adjudicators_FT" table:display="true" table:show-details="true"/>
                <table:data-pilot-member table:name="adjudicators_PT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port_id" table:orientation="row" table:used-hierarchy="0" table:function="auto">
            <table:data-pilot-level table:show-empty="false" calcext:repeat-item-labels="false">
              <table:data-pilot-members>
                <table:data-pilot-member table:name="1998_1999" table:display="true" table:show-details="true"/>
                <table:data-pilot-member table:name="1999_2000" table:display="true" table:show-details="true"/>
                <table:data-pilot-member table:name="2000_2001" table:display="true" table:show-details="true"/>
                <table:data-pilot-member table:name="2001_2002" table:display="true" table:show-details="true"/>
                <table:data-pilot-member table:name="2002_2003" table:display="true" table:show-details="true"/>
                <table:data-pilot-member table:name="2003_2004" table:display="true" table:show-details="true"/>
                <table:data-pilot-member table:name="2004_2005" table:display="true" table:show-details="true"/>
                <table:data-pilot-member table:name="2005_2006" table:display="true" table:show-details="true"/>
                <table:data-pilot-member table:name="2006_2007" table:display="true" table:show-details="true"/>
                <table:data-pilot-member table:name="2007_2008" table:display="true" table:show-details="true"/>
                <table:data-pilot-member table:name="2008_2009" table:display="true" table:show-details="true"/>
                <table:data-pilot-member table:name="2009_2010" table:display="true" table:show-details="true"/>
                <table:data-pilot-member table:name="2020_2021" table:display="true" table:show-details="true"/>
                <table:data-pilot-member table:name="2021_2022" table:display="true" table:show-details="true"/>
                <table:data-pilot-member table:name="2022_2023" table:display="true" table:show-details="true"/>
                <table:data-pilot-member table:name="2023_2024" table:display="true" table:show-details="true"/>
                <table:data-pilot-member table:name="2024_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6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3" table:display="true" table:show-details="true"/>
                <table:data-pilot-member table:name="66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5" table:display="true" table:show-details="true"/>
                <table:data-pilot-member table:name="81" table:display="true" table:show-details="true"/>
                <table:data-pilot-member table:name="28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00-00-00</text:date>, <text:time style:data-style-name="N2" text:time-value="11:56:10.44161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9T18:15:04.778267413</meta:creation-date>
    <meta:generator>LibreOffice/26.2.0.3$Windows_X86_64 LibreOffice_project/620$Build-3</meta:generator>
    <dc:date>2026-05-14T12:31:45.989984600</dc:date>
    <meta:editing-duration>PT7H27M29S</meta:editing-duration>
    <meta:editing-cycles>71</meta:editing-cycles>
    <meta:document-statistic meta:table-count="13" meta:cell-count="13749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11cm" svg:height="9.01cm" xlink:href=".." xlink:type="simple" loext:data-pilot-source="DataPilot1" chart:class="chart:bar" chart:style-name="ch1">
        <chart:title svg:x="2.921cm" svg:y="0.316cm" chart:style-name="ch2">
          <text:p>Applications received and resolved by year at LTB</text:p>
        </chart:title>
        <chart:legend chart:legend-position="end" svg:x="12.732cm" svg:y="2.953cm" style:legend-expansion="high" chart:style-name="ch3"/>
        <chart:plot-area chart:style-name="ch4" svg:x="1.331cm" svg:y="1.275cm" svg:width="11.081cm" svg:height="5.674cm">
          <chart:coordinate-region svg:x="2.73cm" svg:y="1.474cm" svg:width="9.682cm" svg:height="3.727cm"/>
          <chart:axis chart:dimension="x" chart:name="primary-x" chart:style-name="ch5" chartooo:axis-type="auto">
            <chartooo:date-scale/>
            <chart:title svg:x="5.905cm" svg:y="7.129cm" chart:style-name="ch6">
              <text:p><text:span text:style-name="T1">Report years</text:span></text:p>
            </chart:title>
            <chart:categories table:cell-range-address="PT@categories"/>
          </chart:axis>
          <chart:axis chart:dimension="y" chart:name="primary-y" chart:style-name="ch7">
            <chart:title svg:x="0.451cm" svg:y="5.793cm" chart:style-name="ch8">
              <text:p><text:span text:style-name="T1">Number of applications</text:span>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27"/>
          </chart:series>
          <chart:series chart:style-name="ch11" chart:values-cell-range-address="PT@data 1" chart:label-cell-address="PT@label 1" chart:class="chart:bar">
            <chart:data-point chart:repeated="27"/>
          </chart:series>
          <chart:series chart:style-name="ch12" chart:values-cell-range-address="PT@data 2" chart:label-cell-address="PT@label 2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received</text:p>
                <draw:g>
                  <svg:desc>PT@label 0</svg:desc>
                </draw:g>
              </table:table-cell>
              <table:table-cell office:value-type="string">
                <text:p>total_resolved</text:p>
                <draw:g>
                  <svg:desc>PT@label 1</svg:desc>
                </draw:g>
              </table:table-cell>
              <table:table-cell office:value-type="string">
                <text:p>total_unresolved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_1999</text:p>
                <draw:g>
                  <svg:desc>PT@categories</svg:desc>
                </draw:g>
              </table:table-cell>
              <table:table-cell office:value-type="float" office:value="59894">
                <text:p>59894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1999_2000</text:p>
              </table:table-cell>
              <table:table-cell office:value-type="float" office:value="70181">
                <text:p>70181</text:p>
              </table:table-cell>
              <table:table-cell office:value-type="float" office:value="70862">
                <text:p>70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_2001</text:p>
              </table:table-cell>
              <table:table-cell office:value-type="float" office:value="73931">
                <text:p>73931</text:p>
              </table:table-cell>
              <table:table-cell office:value-type="float" office:value="76946">
                <text:p>76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_2002</text:p>
              </table:table-cell>
              <table:table-cell office:value-type="float" office:value="77104">
                <text:p>77104</text:p>
              </table:table-cell>
              <table:table-cell office:value-type="float" office:value="78285">
                <text:p>78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_2003</text:p>
              </table:table-cell>
              <table:table-cell office:value-type="float" office:value="68118">
                <text:p>68118</text:p>
              </table:table-cell>
              <table:table-cell office:value-type="float" office:value="68505">
                <text:p>68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_2004</text:p>
              </table:table-cell>
              <table:table-cell office:value-type="float" office:value="70004">
                <text:p>70004</text:p>
              </table:table-cell>
              <table:table-cell office:value-type="float" office:value="71668">
                <text:p>71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_2005</text:p>
              </table:table-cell>
              <table:table-cell office:value-type="float" office:value="74867">
                <text:p>74867</text:p>
              </table:table-cell>
              <table:table-cell office:value-type="float" office:value="70527">
                <text:p>70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_2006</text:p>
              </table:table-cell>
              <table:table-cell office:value-type="float" office:value="81000">
                <text:p>81000</text:p>
              </table:table-cell>
              <table:table-cell office:value-type="float" office:value="87977">
                <text:p>87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_2007</text:p>
              </table:table-cell>
              <table:table-cell office:value-type="float" office:value="79701">
                <text:p>79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_2008</text:p>
              </table:table-cell>
              <table:table-cell office:value-type="float" office:value="80552">
                <text:p>8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_2009</text:p>
              </table:table-cell>
              <table:table-cell office:value-type="float" office:value="85840">
                <text:p>85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_2010</text:p>
              </table:table-cell>
              <table:table-cell office:value-type="float" office:value="78072">
                <text:p>78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_2011</text:p>
              </table:table-cell>
              <table:table-cell office:value-type="float" office:value="77393">
                <text:p>77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_2012</text:p>
              </table:table-cell>
              <table:table-cell office:value-type="float" office:value="81084">
                <text:p>8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_2013</text:p>
              </table:table-cell>
              <table:table-cell office:value-type="float" office:value="82192">
                <text:p>8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_2014</text:p>
              </table:table-cell>
              <table:table-cell office:value-type="float" office:value="81748">
                <text:p>8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_2015</text:p>
              </table:table-cell>
              <table:table-cell office:value-type="float" office:value="79740">
                <text:p>79740</text:p>
              </table:table-cell>
              <table:table-cell office:value-type="float" office:value="77306">
                <text:p>77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_2016</text:p>
              </table:table-cell>
              <table:table-cell office:value-type="float" office:value="80214">
                <text:p>80214</text:p>
              </table:table-cell>
              <table:table-cell office:value-type="float" office:value="78175">
                <text:p>78175</text:p>
              </table:table-cell>
              <table:table-cell office:value-type="float" office:value="11946">
                <text:p>11946</text:p>
              </table:table-cell>
            </table:table-row>
            <table:table-row>
              <table:table-cell office:value-type="string">
                <text:p>2016_2017</text:p>
              </table:table-cell>
              <table:table-cell office:value-type="float" office:value="81432">
                <text:p>81432</text:p>
              </table:table-cell>
              <table:table-cell office:value-type="float" office:value="78783">
                <text:p>78783</text:p>
              </table:table-cell>
              <table:table-cell office:value-type="float" office:value="13899">
                <text:p>13899</text:p>
              </table:table-cell>
            </table:table-row>
            <table:table-row>
              <table:table-cell office:value-type="string">
                <text:p>2017_2018</text:p>
              </table:table-cell>
              <table:table-cell office:value-type="float" office:value="80791">
                <text:p>80791</text:p>
              </table:table-cell>
              <table:table-cell office:value-type="float" office:value="78744">
                <text:p>78744</text:p>
              </table:table-cell>
              <table:table-cell office:value-type="float" office:value="12944">
                <text:p>12944</text:p>
              </table:table-cell>
            </table:table-row>
            <table:table-row>
              <table:table-cell office:value-type="string">
                <text:p>2018_2019</text:p>
              </table:table-cell>
              <table:table-cell office:value-type="float" office:value="82095">
                <text:p>82095</text:p>
              </table:table-cell>
              <table:table-cell office:value-type="float" office:value="79476">
                <text:p>79476</text:p>
              </table:table-cell>
              <table:table-cell office:value-type="float" office:value="14726">
                <text:p>14726</text:p>
              </table:table-cell>
            </table:table-row>
            <table:table-row>
              <table:table-cell office:value-type="string">
                <text:p>2019_2020</text:p>
              </table:table-cell>
              <table:table-cell office:value-type="float" office:value="80874">
                <text:p>80874</text:p>
              </table:table-cell>
              <table:table-cell office:value-type="float" office:value="72064">
                <text:p>72064</text:p>
              </table:table-cell>
              <table:table-cell office:value-type="float" office:value="22803">
                <text:p>22803</text:p>
              </table:table-cell>
            </table:table-row>
            <table:table-row>
              <table:table-cell office:value-type="string">
                <text:p>2020_2021</text:p>
              </table:table-cell>
              <table:table-cell office:value-type="float" office:value="48422">
                <text:p>48422</text:p>
              </table:table-cell>
              <table:table-cell office:value-type="float" office:value="35983">
                <text:p>35983</text:p>
              </table:table-cell>
              <table:table-cell office:value-type="float" office:value="34731">
                <text:p>34731</text:p>
              </table:table-cell>
            </table:table-row>
            <table:table-row>
              <table:table-cell office:value-type="string">
                <text:p>2021_2022</text:p>
              </table:table-cell>
              <table:table-cell office:value-type="float" office:value="61705">
                <text:p>61705</text:p>
              </table:table-cell>
              <table:table-cell office:value-type="float" office:value="61868">
                <text:p>61868</text:p>
              </table:table-cell>
              <table:table-cell office:value-type="float" office:value="32800">
                <text:p>32800</text:p>
              </table:table-cell>
            </table:table-row>
            <table:table-row>
              <table:table-cell office:value-type="string">
                <text:p>2022_2023</text:p>
              </table:table-cell>
              <table:table-cell office:value-type="float" office:value="73406">
                <text:p>73406</text:p>
              </table:table-cell>
              <table:table-cell office:value-type="float" office:value="52986">
                <text:p>52986</text:p>
              </table:table-cell>
              <table:table-cell office:value-type="float" office:value="53057">
                <text:p>53057</text:p>
              </table:table-cell>
            </table:table-row>
            <table:table-row>
              <table:table-cell office:value-type="string">
                <text:p>2023_2024</text:p>
              </table:table-cell>
              <table:table-cell office:value-type="float" office:value="82285">
                <text:p>82285</text:p>
              </table:table-cell>
              <table:table-cell office:value-type="float" office:value="88307">
                <text:p>88307</text:p>
              </table:table-cell>
              <table:table-cell office:value-type="float" office:value="53030">
                <text:p>53030</text:p>
              </table:table-cell>
            </table:table-row>
            <table:table-row>
              <table:table-cell office:value-type="string">
                <text:p>2024_2025</text:p>
              </table:table-cell>
              <table:table-cell office:value-type="float" office:value="87993">
                <text:p>87993</text:p>
              </table:table-cell>
              <table:table-cell office:value-type="float" office:value="108146">
                <text:p>108146</text:p>
              </table:table-cell>
              <table:table-cell office:value-type="float" office:value="41465">
                <text:p>41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11cm" svg:height="9.01cm" xlink:href=".." xlink:type="simple" loext:data-pilot-source="DataPilot2" chart:class="chart:bar" chart:style-name="ch1">
        <chart:title svg:x="3.596cm" svg:y="0.316cm" chart:style-name="ch2">
          <text:p>Number of Adjudicators by Year and Status</text:p>
        </chart:title>
        <chart:legend chart:legend-position="end" svg:x="12.771cm" svg:y="2.953cm" style:legend-expansion="high" chart:style-name="ch3"/>
        <chart:plot-area chart:style-name="ch4" svg:x="1.331cm" svg:y="1.275cm" svg:width="11.12cm" svg:height="5.674cm">
          <chart:coordinate-region svg:x="2.395cm" svg:y="1.474cm" svg:width="10.056cm" svg:height="3.727cm"/>
          <chart:axis chart:dimension="x" chart:name="primary-x" chart:style-name="ch5" chartooo:axis-type="auto">
            <chartooo:date-scale/>
            <chart:title svg:x="6.004cm" svg:y="7.129cm" chart:style-name="ch6">
              <text:p><text:span text:style-name="T1">Report year</text:span></text:p>
            </chart:title>
            <chart:categories table:cell-range-address="PT@categories"/>
          </chart:axis>
          <chart:axis chart:dimension="y" chart:name="primary-y" chart:style-name="ch7">
            <chart:title svg:x="0.451cm" svg:y="5.81cm" chart:style-name="ch8">
              <text:p><text:span text:style-name="T1">Number of adjudicators</text:span>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17"/>
          </chart:series>
          <chart:series chart:style-name="ch11" chart:values-cell-range-address="PT@data 1" chart:label-cell-address="PT@label 1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judicators_FT</text:p>
                <draw:g>
                  <svg:desc>PT@label 0</svg:desc>
                </draw:g>
              </table:table-cell>
              <table:table-cell office:value-type="string">
                <text:p>adjudicators_PT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_1999</text:p>
                <draw:g>
                  <svg:desc>PT@categories</svg:desc>
                </draw:g>
              </table:table-cell>
              <table:table-cell office:value-type="float" office:value="41">
                <text:p>41</text:p>
                <draw:g>
                  <svg:desc>PT@data 0</svg:desc>
                </draw:g>
              </table:table-cell>
              <table:table-cell office:value-type="float" office:value="1">
                <text:p>1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1999_2000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0_2001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1_2002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2_200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_200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_2005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5_2006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6_2007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7_2008</text:p>
              </table:table-cell>
              <table:table-cell office:value-type="float" office:value="69">
                <text:p>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8_2009</text:p>
              </table:table-cell>
              <table:table-cell office:value-type="float" office:value="63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9_2010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0_2021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1_2022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2_2023</text:p>
              </table:table-cell>
              <table:table-cell office:value-type="float" office:value="79">
                <text:p>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23_2024</text:p>
              </table:table-cell>
              <table:table-cell office:value-type="float" office:value="75">
                <text:p>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24_2025</text:p>
              </table:table-cell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